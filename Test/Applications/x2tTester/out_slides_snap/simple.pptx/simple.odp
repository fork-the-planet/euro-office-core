
<file path=META-INF/manifest.xml><?xml version="1.0" encoding="utf-8"?>
<manifest:manifest xmlns:manifest="urn:oasis:names:tc:opendocument:xmlns:manifest:1.0">
  <manifest:file-entry manifest:full-path="Pictures/image1.jpe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scripts/>
  <office:font-face-decls/>
  <office:automatic-styles>
    <style:style style:family="drawing-page" style:name="dp6">
      <style:drawing-page-properties/>
    </style:style>
    <style:style style:family="presentation" style:name="pr3">
      <style:graphic-properties draw:fill="none" draw:textarea-vertical-align="middle"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43">
      <style:paragraph-properties/>
      <style:text-properties/>
    </style:style>
    <style:style style:family="paragraph" style:name="P44">
      <style:paragraph-properties fo:text-indent="0pt"/>
      <style:text-properties/>
    </style:style>
    <style:style style:family="text" style:name="T41">
      <style:text-properties fo:color="#FFFFFF" style:text-line-through-type="none" fo:font-family="Arial" fo:font-size="33pt" style:font-size-asian="33pt" style:font-size-complex="33pt" fo:language="en" fo:country="US" style:text-underline-type="none" fo:font-weight="normal"/>
    </style:style>
    <style:style style:family="presentation" style:name="pr4">
      <style:graphic-properties draw:fill="none" draw:textarea-vertical-align="middle"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45">
      <style:paragraph-properties/>
      <style:text-properties/>
    </style:style>
    <style:style style:family="paragraph" style:name="P46">
      <style:paragraph-properties fo:text-align="center" fo:text-indent="0pt"/>
      <style:text-properties/>
    </style:style>
    <style:style style:family="text" style:name="T42">
      <style:text-properties fo:color="#FFFFFF" style:text-line-through-type="none" fo:font-family="DejaVu Sans" style:font-family-asian="DejaVu Sans" fo:font-size="32pt" style:font-size-asian="32pt" style:font-size-complex="32pt" fo:language="en" fo:country="US" style:text-underline-type="none" fo:font-weight="normal"/>
    </style:style>
    <style:style style:family="drawing-page" style:name="dp8">
      <style:drawing-page-properties/>
    </style:style>
    <style:style style:family="presentation" style:name="pr7">
      <style:graphic-properties draw:fill="none" draw:textarea-vertical-align="middle"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57">
      <style:paragraph-properties/>
      <style:text-properties/>
    </style:style>
    <style:style style:family="paragraph" style:name="P58">
      <style:paragraph-properties fo:text-align="center" fo:text-indent="0pt"/>
      <style:text-properties/>
    </style:style>
    <style:style style:family="text" style:name="T51">
      <style:text-properties fo:color="#FFFFFF" style:text-line-through-type="none" fo:font-family="Arial" fo:font-size="33pt" style:font-size-asian="33pt" style:font-size-complex="33pt" fo:language="en" fo:country="US" style:text-underline-type="none" fo:font-weight="normal"/>
    </style:style>
    <style:style style:parent-style-name="Graphics" style:family="graphic" style:name="gr27">
      <style:graphic-properties draw:fill="none" draw:image-opacity="70%" style:repeat="stretch" draw:stroke="none" svg:stroke-width="0.05cm" style:wrap="run-through" fo:background-color="transparent"/>
    </style:style>
    <style:style style:family="presentation" style:name="pr8">
      <style:graphic-properties draw:fill="none" draw:textarea-vertical-align="bottom"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59">
      <style:paragraph-properties fo:text-align="right" fo:text-indent="0pt"/>
      <style:text-properties fo:color="#FFFFFF" style:text-line-through-type="none" fo:font-family="Arial" fo:font-size="14pt" style:font-size-asian="14pt" style:font-size-complex="14pt" fo:language="en" fo:country="US" style:text-underline-type="none" fo:font-weight="normal"/>
    </style:style>
    <style:style style:family="paragraph" style:name="P60">
      <style:paragraph-properties fo:text-align="right" fo:text-indent="0pt"/>
      <style:text-properties fo:color="#FFFFFF" style:text-line-through-type="none" fo:font-family="Arial" fo:font-size="14pt" style:font-size-asian="14pt" style:font-size-complex="14pt" fo:language="en" fo:country="US" style:text-underline-type="none" fo:font-weight="normal"/>
    </style:style>
    <style:style style:family="drawing-page" style:name="dp10">
      <style:drawing-page-properties/>
    </style:style>
    <style:style style:family="presentation" style:name="pr11">
      <style:graphic-properties draw:fill="none" draw:textarea-vertical-align="middle"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71">
      <style:paragraph-properties/>
      <style:text-properties/>
    </style:style>
    <style:style style:family="paragraph" style:name="P72">
      <style:paragraph-properties fo:text-align="center" fo:text-indent="0pt"/>
      <style:text-properties/>
    </style:style>
    <style:style style:family="text" style:name="T60">
      <style:text-properties fo:color="#800080" style:text-line-through-type="none" fo:font-family="Arial" fo:font-size="33pt" style:font-size-asian="33pt" style:font-size-complex="33pt" fo:language="en" fo:country="US" style:text-underline-type="none" fo:font-weight="normal"/>
    </style:style>
    <style:style style:parent-style-name="Graphics" style:family="graphic" style:name="gr33">
      <style:graphic-properties draw:fill="none" draw:image-opacity="70%" style:repeat="stretch" draw:stroke="none" svg:stroke-width="0.05cm" style:wrap="run-through" fo:background-color="transparent"/>
    </style:style>
    <style:style style:family="presentation" style:name="pr12">
      <style:graphic-properties draw:fill="none" draw:textarea-vertical-align="bottom"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73">
      <style:paragraph-properties fo:text-align="right" fo:text-indent="0pt"/>
      <style:text-properties fo:color="#000000" style:text-line-through-type="none" fo:font-family="Arial" fo:font-size="14pt" style:font-size-asian="14pt" style:font-size-complex="14pt" fo:language="en" fo:country="US" style:text-underline-type="none" fo:font-weight="normal"/>
    </style:style>
    <style:style style:family="paragraph" style:name="P74">
      <style:paragraph-properties fo:text-align="right" fo:text-indent="0pt"/>
      <style:text-properties fo:color="#000000" style:text-line-through-type="none" fo:font-family="Arial" fo:font-size="14pt" style:font-size-asian="14pt" style:font-size-complex="14pt" fo:language="en" fo:country="US" style:text-underline-type="none" fo:font-weight="normal"/>
    </style:style>
    <style:style style:family="drawing-page" style:name="dp11">
      <style:drawing-page-properties/>
    </style:style>
    <style:style style:family="presentation" style:name="pr13">
      <style:graphic-properties draw:fill="none" draw:textarea-vertical-align="middle"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75">
      <style:paragraph-properties/>
      <style:text-properties/>
    </style:style>
    <style:style style:family="paragraph" style:name="P76">
      <style:paragraph-properties fo:text-align="center" fo:text-indent="0pt"/>
      <style:text-properties/>
    </style:style>
    <style:style style:family="text" style:name="T61">
      <style:text-properties fo:color="#FFFFFF" style:text-line-through-type="none" fo:font-family="Arial" fo:font-size="33pt" style:font-size-asian="33pt" style:font-size-complex="33pt" fo:language="en" fo:country="US" style:text-underline-type="none" fo:font-weight="normal"/>
    </style:style>
    <style:style style:parent-style-name="Graphics" style:family="graphic" style:name="gr34">
      <style:graphic-properties draw:fill="none" draw:image-opacity="70%" style:repeat="stretch" draw:stroke="none" svg:stroke-width="0.05cm" style:wrap="run-through" fo:background-color="transparent"/>
    </style:style>
    <style:style style:family="presentation" style:name="pr14">
      <style:graphic-properties draw:fill="none" draw:textarea-vertical-align="bottom" draw:auto-grow-height="true" draw:fit-to-size="false" style:shrink-to-fit="false" draw:stroke="none" svg:stroke-width="0cm" style:wrap="run-through" fo:border="0cm none #000000" fo:padding-top="0pt" fo:padding-bottom="0pt" fo:padding-left="0pt" fo:padding-right="0pt" fo:background-color="transparent"/>
    </style:style>
    <style:style style:family="paragraph" style:name="P77">
      <style:paragraph-properties fo:text-align="right" fo:text-indent="0pt"/>
      <style:text-properties fo:color="#000000" style:text-line-through-type="none" fo:font-family="Arial" fo:font-size="14pt" style:font-size-asian="14pt" style:font-size-complex="14pt" fo:language="en" fo:country="US" style:text-underline-type="none" fo:font-weight="normal"/>
    </style:style>
    <style:style style:family="paragraph" style:name="P78">
      <style:paragraph-properties fo:text-align="right" fo:text-indent="0pt"/>
      <style:text-properties fo:color="#000000" style:text-line-through-type="none" fo:font-family="Arial" fo:font-size="14pt" style:font-size-asian="14pt" style:font-size-complex="14pt" fo:language="en" fo:country="US" style:text-underline-type="none" fo:font-weight="normal"/>
    </style:style>
    <text:list-style style:name="L1"/>
    <text:list-style style:name="L2"/>
    <text:list-style style:name="L3"/>
  </office:automatic-styles>
  <office:body>
    <office:presentation>
      <draw:page draw:name="Slide_1" draw:style-name="dp6" draw:master-page-name="Office_Lights" presentation:presentation-page-layout-name="AL2">
        <draw:frame xml:id="id15" draw:id="id15" draw:name="PlaceHolder 1" draw:text-style-name="P43" draw:layer="layout" presentation:style-name="pr3" presentation:class="title" presentation:placeholder="true" svg:width="25.2cm" svg:height="2.63cm" svg:x="1.4cm" svg:y="3.969cm">
          <draw:text-box fo:min-height="2.63cm">
            <text:p text:style-name="P44"><text:span text:style-name="T41">Test</text:span></text:p>
          </draw:text-box>
        </draw:frame>
        <draw:frame xml:id="id16" draw:id="id16" draw:name="PlaceHolder 2" draw:text-style-name="P45" draw:layer="layout" presentation:style-name="pr4" presentation:class="subtitle" presentation:placeholder="true" svg:width="25.2cm" svg:height="7.903cm" svg:x="1.4cm" svg:y="6.058cm">
          <draw:text-box fo:min-height="7.903cm">
            <text:p text:style-name="P46"><text:span text:style-name="T42">Lorem ipsum dolor sit amet, consectetur adipiscing elit. Nam at purus mi. Nam egestas odio ac iaculis porta. Nunc mattis sit amet purus et elementum. Sed odio sem, laoreet eu dui in, pretium semper sem. </text:span></text:p>
          </draw:text-box>
        </draw:frame>
      </draw:page>
      <draw:page draw:name="Slide_2" draw:style-name="dp8" draw:master-page-name="Office_Lights1" presentation:presentation-page-layout-name="AL3">
        <draw:frame xml:id="id32" draw:id="id32" draw:name="PlaceHolder 1" draw:text-style-name="P57" draw:layer="layout" presentation:style-name="pr7" presentation:class="title" presentation:placeholder="true" svg:width="25cm" svg:height="2.75cm" svg:x="1.5cm" svg:y="0.75cm">
          <draw:text-box fo:min-height="2.75cm">
            <text:p text:style-name="P58"><text:span text:style-name="T51">Test</text:span></text:p>
          </draw:text-box>
        </draw:frame>
        <draw:frame xml:id="id33" draw:id="id33" draw:style-name="gr27" svg:width="13.33cm" svg:height="10cm" svg:x="7.334cm" svg:y="4cm">
          <draw:image xlink:href="Pictures/image1.jpeg" xlink:type="simple" xlink:show="embed" xlink:actuate="onLoad"/>
        </draw:frame>
        <draw:frame xml:id="id34" draw:id="id34" draw:name="PlaceHolder 2" draw:text-style-name="P59" draw:layer="layout" presentation:style-name="pr8" presentation:class="page-number" presentation:placeholder="true" svg:width="6.5cm" svg:height="1.09cm" svg:x="21cm" svg:y="14.25cm">
          <draw:text-box fo:min-height="1.09cm">
            <text:p text:style-name="P60"><text:span><text:page-number>2</text:page-number></text:span></text:p>
          </draw:text-box>
        </draw:frame>
      </draw:page>
      <draw:page draw:name="Slide_3" draw:style-name="dp10" draw:master-page-name="Office_Lights2" presentation:presentation-page-layout-name="AL4">
        <draw:frame xml:id="id42" draw:id="id42" draw:name="PlaceHolder 1" draw:text-style-name="P71" draw:layer="layout" presentation:style-name="pr11" presentation:class="title" presentation:placeholder="true" svg:width="25cm" svg:height="2.75cm" svg:x="1.5cm" svg:y="0.75cm">
          <draw:text-box fo:min-height="2.75cm">
            <text:p text:style-name="P72"><text:span text:style-name="T60">Test</text:span></text:p>
          </draw:text-box>
        </draw:frame>
        <draw:frame xml:id="id43" draw:id="id43" draw:style-name="gr33" svg:width="13.33cm" svg:height="10cm" svg:x="7.333cm" svg:y="4cm">
          <draw:image xlink:href="Pictures/image2.png" xlink:type="simple" xlink:show="embed" xlink:actuate="onLoad"/>
        </draw:frame>
        <draw:frame xml:id="id44" draw:id="id44" draw:name="PlaceHolder 2" draw:text-style-name="P73" draw:layer="layout" presentation:style-name="pr12" presentation:class="page-number" presentation:placeholder="true" svg:width="6.5cm" svg:height="1.09cm" svg:x="21cm" svg:y="14.25cm">
          <draw:text-box fo:min-height="1.09cm">
            <text:p text:style-name="P74"><text:span><text:page-number>3</text:page-number></text:span></text:p>
          </draw:text-box>
        </draw:frame>
      </draw:page>
      <draw:page draw:name="Slide_4" draw:style-name="dp11" draw:master-page-name="Office_Lights2" presentation:presentation-page-layout-name="AL4">
        <draw:frame xml:id="id45" draw:id="id45" draw:name="PlaceHolder 1" draw:text-style-name="P75" draw:layer="layout" presentation:style-name="pr13" presentation:class="title" presentation:placeholder="true" svg:width="25cm" svg:height="2.75cm" svg:x="1.5cm" svg:y="0.75cm">
          <draw:text-box fo:min-height="2.75cm">
            <text:p text:style-name="P76"><text:span text:style-name="T61">Test</text:span></text:p>
          </draw:text-box>
        </draw:frame>
        <draw:frame xml:id="id46" draw:id="id46" draw:style-name="gr34" svg:width="13.33cm" svg:height="10cm" svg:x="7.333cm" svg:y="4cm">
          <draw:image xlink:href="Pictures/image2.png" xlink:type="simple" xlink:show="embed" xlink:actuate="onLoad"/>
        </draw:frame>
        <draw:frame xml:id="id47" draw:id="id47" draw:name="PlaceHolder 2" draw:text-style-name="P77" draw:layer="layout" presentation:style-name="pr14" presentation:class="page-number" presentation:placeholder="true" svg:width="6.5cm" svg:height="1.09cm" svg:x="21cm" svg:y="14.25cm">
          <draw:text-box fo:min-height="1.09cm">
            <text:p text:style-name="P78"><text:span><text:page-number>4</text:page-number></text:span></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paragraph-properties/>
      <style:text-properties/>
    </style:default-style>
    <style:default-style style:family="table">
      <style:table-properties table:border-model="collapsing"/>
    </style:default-style>
    <style:default-style style:family="table-row">
      <style:table-row-properties fo:keep-together="auto"/>
    </style:default-style>
    <draw:gradient draw:start-color="#F60063" draw:end-color="#000032" draw:end-intensity="100%" draw:start-intensity="100%" draw:border="0%" draw:angle="200deg" draw:style="linear" draw:name="Gradient1" draw:display_name="UserGradient1">
      <loext:gradient-stop loext:color-type="rgb" loext:color-value="#000032" svg:offset="0.7"/>
      <loext:gradient-stop loext:color-type="rgb" loext:color-value="#F60063" svg:offset="0"/>
    </draw:gradient>
    <draw:gradient draw:start-color="#F60063" draw:end-color="#000032" draw:end-intensity="100%" draw:start-intensity="100%" draw:border="0%" draw:angle="200deg" draw:style="linear" draw:name="Gradient2" draw:display_name="UserGradient2">
      <loext:gradient-stop loext:color-type="rgb" loext:color-value="#000032" svg:offset="0.7"/>
      <loext:gradient-stop loext:color-type="rgb" loext:color-value="#F60063" svg:offset="0"/>
    </draw:gradient>
    <draw:gradient draw:start-color="#FFFFFF" draw:end-color="#FFFFFF" draw:end-intensity="100%" draw:start-intensity="100%" draw:cx="15%" draw:cy="50%" draw:border="0%" draw:style="radial" draw:name="Gradient3" draw:display_name="UserGradient3">
      <loext:gradient-stop loext:color-type="rgb" loext:color-value="#FFFFFF" svg:offset="1"/>
      <loext:gradient-stop loext:color-type="rgb" loext:color-value="#FFFFFF" svg:offset="0.25"/>
    </draw:gradient>
    <draw:gradient draw:start-color="#F60063" draw:end-color="#000032" draw:end-intensity="100%" draw:start-intensity="100%" draw:border="0%" draw:angle="200deg" draw:style="linear" draw:name="Gradient4" draw:display_name="UserGradient4">
      <loext:gradient-stop loext:color-type="rgb" loext:color-value="#000032" svg:offset="0.7"/>
      <loext:gradient-stop loext:color-type="rgb" loext:color-value="#F60063" svg:offset="0"/>
    </draw:gradient>
    <draw:gradient draw:start-color="#FFFFFF" draw:end-color="#FFFFFF" draw:end-intensity="100%" draw:start-intensity="100%" draw:cx="15%" draw:cy="50%" draw:border="0%" draw:style="radial" draw:name="Gradient5" draw:display_name="UserGradient5">
      <loext:gradient-stop loext:color-type="rgb" loext:color-value="#FFFFFF" svg:offset="1"/>
      <loext:gradient-stop loext:color-type="rgb" loext:color-value="#FFFFFF" svg:offset="0.25"/>
    </draw:gradient>
    <draw:opacity draw:start="20%" draw:end="89.8039%" draw:cx="50%" draw:cy="-34950%" draw:style="radial" draw:name="Opacity1" draw:display_name="UserOpacity1">
      <loext:opacity-stop svg:stop-opacity="0.2" svg:offset="1"/>
      <loext:opacity-stop svg:stop-opacity="0.898039" svg:offset="0.25"/>
    </draw:opacity>
    <draw:opacity draw:start="20%" draw:end="89.8039%" draw:cx="50%" draw:cy="-34950%" draw:style="radial" draw:name="Opacity2" draw:display_name="UserOpacity2">
      <loext:opacity-stop svg:stop-opacity="0.2" svg:offset="1"/>
      <loext:opacity-stop svg:stop-opacity="0.898039" svg:offset="0.25"/>
    </draw:opacity>
    <style:presentation-page-layout style:name="AL1">
      <presentation:placeholder presentation:object="title" svg:height="2.75cm" svg:width="25cm" svg:x="1.5cm" svg:y="4cm" draw:text-style-name="P1"/>
      <presentation:placeholder presentation:object="outline" svg:height="6cm" svg:width="25cm" svg:x="1.5cm" svg:y="7.25cm" draw:text-style-name="P8"/>
    </style:presentation-page-layout>
    <style:presentation-page-layout style:name="AL2">
      <presentation:placeholder presentation:object="title" svg:height="2.75cm" svg:width="25cm" svg:x="1.5cm" svg:y="4cm" draw:text-style-name="P9"/>
      <presentation:placeholder presentation:object="outline" svg:height="6cm" svg:width="25cm" svg:x="1.5cm" svg:y="7.25cm" draw:text-style-name="P16"/>
    </style:presentation-page-layout>
    <style:presentation-page-layout style:name="AL3">
      <presentation:placeholder presentation:object="title" svg:height="2.75cm" svg:width="25cm" svg:x="1.5cm" svg:y="0.75cm" draw:text-style-name="P17"/>
      <presentation:placeholder presentation:object="outline" svg:height="10cm" svg:width="25cm" svg:x="1.5cm" svg:y="4cm" draw:text-style-name="P24"/>
    </style:presentation-page-layout>
    <style:presentation-page-layout style:name="AL4">
      <presentation:placeholder presentation:object="title" svg:height="2.75cm" svg:width="25cm" svg:x="1.5cm" svg:y="0.75cm" draw:text-style-name="P25"/>
      <presentation:placeholder presentation:object="outline" svg:height="10cm" svg:width="25cm" svg:x="1.5cm" svg:y="4cm" draw:text-style-name="P32"/>
    </style:presentation-page-layout>
    <style:style style:family="graphic" style:name="Frame">
      <style:graphic-properties/>
      <style:text-properties/>
    </style:style>
    <text:list-style style:name="L1">
      <text:list-level-style-bullet text:level="1" text:bullet-char="">
        <style:list-level-properties text:space-before="1pt" text:min-label-width="25.51pt"/>
        <style:text-properties fo:color="#FFFFFF" fo:font-family="Wingdings" fo:font-size="45%"/>
      </text:list-level-style-bullet>
    </text:list-style>
    <text:list-style style:name="L2">
      <text:list-level-style-bullet text:level="2" text:bullet-char="">
        <style:list-level-properties text:space-before="1pt" text:min-label-width="25.51pt"/>
        <style:text-properties fo:color="#FFFFFF" fo:font-family="Symbol" fo:font-size="75%"/>
      </text:list-level-style-bullet>
    </text:list-style>
    <text:list-style style:name="L3">
      <text:list-level-style-bullet text:level="3" text:bullet-char="">
        <style:list-level-properties text:space-before="1pt" text:min-label-width="22.68pt"/>
        <style:text-properties fo:color="#FFFFFF" fo:font-family="Wingdings" fo:font-size="45%"/>
      </text:list-level-style-bullet>
    </text:list-style>
    <text:list-style style:name="L4">
      <text:list-level-style-bullet text:level="4" text:bullet-char="">
        <style:list-level-properties text:space-before="1pt" text:min-label-width="17.01pt"/>
        <style:text-properties fo:color="#FFFFFF" fo:font-family="Symbol" fo:font-size="75%"/>
      </text:list-level-style-bullet>
    </text:list-style>
    <text:list-style style:name="L5">
      <text:list-level-style-bullet text:level="5" text:bullet-char="">
        <style:list-level-properties text:space-before="1pt" text:min-label-width="17.01pt"/>
        <style:text-properties fo:color="#FFFFFF" fo:font-family="Wingdings" fo:font-size="45%"/>
      </text:list-level-style-bullet>
    </text:list-style>
    <text:list-style style:name="L6">
      <text:list-level-style-bullet text:level="6" text:bullet-char="">
        <style:list-level-properties text:space-before="1pt" text:min-label-width="17.01pt"/>
        <style:text-properties fo:color="#FFFFFF" fo:font-family="Wingdings" fo:font-size="45%"/>
      </text:list-level-style-bullet>
    </text:list-style>
    <text:list-style style:name="L7">
      <text:list-level-style-bullet text:level="7" text:bullet-char="">
        <style:list-level-properties text:space-before="1pt" text:min-label-width="17.01pt"/>
        <style:text-properties fo:color="#FFFFFF" fo:font-family="Wingdings" fo:font-size="45%"/>
      </text:list-level-style-bullet>
    </text:list-style>
    <text:list-style style:name="L8">
      <text:list-level-style-bullet text:level="1" text:bullet-char="">
        <style:list-level-properties text:space-before="1pt" text:min-label-width="25.51pt"/>
        <style:text-properties fo:color="#FFFFFF" fo:font-family="Wingdings" fo:font-size="45%"/>
      </text:list-level-style-bullet>
    </text:list-style>
    <text:list-style style:name="L9">
      <text:list-level-style-bullet text:level="2" text:bullet-char="">
        <style:list-level-properties text:space-before="1pt" text:min-label-width="25.51pt"/>
        <style:text-properties fo:color="#FFFFFF" fo:font-family="Symbol" fo:font-size="75%"/>
      </text:list-level-style-bullet>
    </text:list-style>
    <text:list-style style:name="L10">
      <text:list-level-style-bullet text:level="3" text:bullet-char="">
        <style:list-level-properties text:space-before="1pt" text:min-label-width="22.68pt"/>
        <style:text-properties fo:color="#FFFFFF" fo:font-family="Wingdings" fo:font-size="45%"/>
      </text:list-level-style-bullet>
    </text:list-style>
    <text:list-style style:name="L11">
      <text:list-level-style-bullet text:level="4" text:bullet-char="">
        <style:list-level-properties text:space-before="1pt" text:min-label-width="17.01pt"/>
        <style:text-properties fo:color="#FFFFFF" fo:font-family="Symbol" fo:font-size="75%"/>
      </text:list-level-style-bullet>
    </text:list-style>
    <text:list-style style:name="L12">
      <text:list-level-style-bullet text:level="5" text:bullet-char="">
        <style:list-level-properties text:space-before="1pt" text:min-label-width="17.01pt"/>
        <style:text-properties fo:color="#FFFFFF" fo:font-family="Wingdings" fo:font-size="45%"/>
      </text:list-level-style-bullet>
    </text:list-style>
    <text:list-style style:name="L13">
      <text:list-level-style-bullet text:level="6" text:bullet-char="">
        <style:list-level-properties text:space-before="1pt" text:min-label-width="17.01pt"/>
        <style:text-properties fo:color="#FFFFFF" fo:font-family="Wingdings" fo:font-size="45%"/>
      </text:list-level-style-bullet>
    </text:list-style>
    <text:list-style style:name="L14">
      <text:list-level-style-bullet text:level="7" text:bullet-char="">
        <style:list-level-properties text:space-before="1pt" text:min-label-width="17.01pt"/>
        <style:text-properties fo:color="#FFFFFF" fo:font-family="Wingdings" fo:font-size="45%"/>
      </text:list-level-style-bullet>
    </text:list-style>
    <text:list-style style:name="L15">
      <text:list-level-style-bullet text:level="1" text:bullet-char="">
        <style:list-level-properties text:space-before="1pt" text:min-label-width="25.51pt"/>
        <style:text-properties fo:color="#000000" fo:font-family="Wingdings" fo:font-size="45%"/>
      </text:list-level-style-bullet>
    </text:list-style>
    <text:list-style style:name="L16">
      <text:list-level-style-bullet text:level="2" text:bullet-char="">
        <style:list-level-properties text:space-before="1pt" text:min-label-width="25.51pt"/>
        <style:text-properties fo:color="#000000" fo:font-family="Symbol" fo:font-size="75%"/>
      </text:list-level-style-bullet>
    </text:list-style>
    <text:list-style style:name="L17">
      <text:list-level-style-bullet text:level="3" text:bullet-char="">
        <style:list-level-properties text:space-before="1pt" text:min-label-width="22.68pt"/>
        <style:text-properties fo:color="#000000" fo:font-family="Wingdings" fo:font-size="45%"/>
      </text:list-level-style-bullet>
    </text:list-style>
    <text:list-style style:name="L18">
      <text:list-level-style-bullet text:level="4" text:bullet-char="">
        <style:list-level-properties text:space-before="1pt" text:min-label-width="17.01pt"/>
        <style:text-properties fo:color="#000000" fo:font-family="Symbol" fo:font-size="75%"/>
      </text:list-level-style-bullet>
    </text:list-style>
    <text:list-style style:name="L19">
      <text:list-level-style-bullet text:level="5" text:bullet-char="">
        <style:list-level-properties text:space-before="1pt" text:min-label-width="17.01pt"/>
        <style:text-properties fo:color="#000000" fo:font-family="Wingdings" fo:font-size="45%"/>
      </text:list-level-style-bullet>
    </text:list-style>
    <text:list-style style:name="L20">
      <text:list-level-style-bullet text:level="6" text:bullet-char="">
        <style:list-level-properties text:space-before="1pt" text:min-label-width="17.01pt"/>
        <style:text-properties fo:color="#000000" fo:font-family="Wingdings" fo:font-size="45%"/>
      </text:list-level-style-bullet>
    </text:list-style>
    <text:list-style style:name="L21">
      <text:list-level-style-bullet text:level="7" text:bullet-char="">
        <style:list-level-properties text:space-before="1pt" text:min-label-width="17.01pt"/>
        <style:text-properties fo:color="#000000" fo:font-family="Wingdings" fo:font-size="45%"/>
      </text:list-level-style-bullet>
    </text:list-style>
    <text:list-style style:name="L22">
      <text:list-level-style-bullet text:level="1" text:bullet-char="">
        <style:list-level-properties text:space-before="1pt" text:min-label-width="25.51pt"/>
        <style:text-properties fo:color="#000000" fo:font-family="Wingdings" fo:font-size="45%"/>
      </text:list-level-style-bullet>
    </text:list-style>
    <text:list-style style:name="L23">
      <text:list-level-style-bullet text:level="2" text:bullet-char="">
        <style:list-level-properties text:space-before="1pt" text:min-label-width="25.51pt"/>
        <style:text-properties fo:color="#000000" fo:font-family="Symbol" fo:font-size="75%"/>
      </text:list-level-style-bullet>
    </text:list-style>
    <text:list-style style:name="L24">
      <text:list-level-style-bullet text:level="3" text:bullet-char="">
        <style:list-level-properties text:space-before="1pt" text:min-label-width="22.68pt"/>
        <style:text-properties fo:color="#000000" fo:font-family="Wingdings" fo:font-size="45%"/>
      </text:list-level-style-bullet>
    </text:list-style>
    <text:list-style style:name="L25">
      <text:list-level-style-bullet text:level="4" text:bullet-char="">
        <style:list-level-properties text:space-before="1pt" text:min-label-width="17.01pt"/>
        <style:text-properties fo:color="#000000" fo:font-family="Symbol" fo:font-size="75%"/>
      </text:list-level-style-bullet>
    </text:list-style>
    <text:list-style style:name="L26">
      <text:list-level-style-bullet text:level="5" text:bullet-char="">
        <style:list-level-properties text:space-before="1pt" text:min-label-width="17.01pt"/>
        <style:text-properties fo:color="#000000" fo:font-family="Wingdings" fo:font-size="45%"/>
      </text:list-level-style-bullet>
    </text:list-style>
    <text:list-style style:name="L27">
      <text:list-level-style-bullet text:level="6" text:bullet-char="">
        <style:list-level-properties text:space-before="1pt" text:min-label-width="17.01pt"/>
        <style:text-properties fo:color="#000000" fo:font-family="Wingdings" fo:font-size="45%"/>
      </text:list-level-style-bullet>
    </text:list-style>
    <text:list-style style:name="L28">
      <text:list-level-style-bullet text:level="7" text:bullet-char="">
        <style:list-level-properties text:space-before="1pt" text:min-label-width="17.01pt"/>
        <style:text-properties fo:color="#000000" fo:font-family="Wingdings" fo:font-size="45%"/>
      </text:list-level-style-bullet>
    </text:list-style>
    <text:list-style style:name="L29">
      <text:list-level-style-bullet text:level="1" text:bullet-char="">
        <style:list-level-properties text:space-before="1pt" text:min-label-width="25.51pt"/>
        <style:text-properties fo:color="#FFFFFF" fo:font-family="Wingdings" fo:font-size="45%"/>
      </text:list-level-style-bullet>
    </text:list-style>
    <text:list-style style:name="L30">
      <text:list-level-style-bullet text:level="2" text:bullet-char="">
        <style:list-level-properties text:space-before="1pt" text:min-label-width="25.51pt"/>
        <style:text-properties fo:color="#FFFFFF" fo:font-family="Symbol" fo:font-size="75%"/>
      </text:list-level-style-bullet>
    </text:list-style>
    <text:list-style style:name="L31">
      <text:list-level-style-bullet text:level="3" text:bullet-char="">
        <style:list-level-properties text:space-before="1pt" text:min-label-width="22.68pt"/>
        <style:text-properties fo:color="#FFFFFF" fo:font-family="Wingdings" fo:font-size="45%"/>
      </text:list-level-style-bullet>
    </text:list-style>
    <text:list-style style:name="L32">
      <text:list-level-style-bullet text:level="4" text:bullet-char="">
        <style:list-level-properties text:space-before="1pt" text:min-label-width="17.01pt"/>
        <style:text-properties fo:color="#FFFFFF" fo:font-family="Symbol" fo:font-size="75%"/>
      </text:list-level-style-bullet>
    </text:list-style>
    <text:list-style style:name="L33">
      <text:list-level-style-bullet text:level="5" text:bullet-char="">
        <style:list-level-properties text:space-before="1pt" text:min-label-width="17.01pt"/>
        <style:text-properties fo:color="#FFFFFF" fo:font-family="Wingdings" fo:font-size="45%"/>
      </text:list-level-style-bullet>
    </text:list-style>
    <text:list-style style:name="L34">
      <text:list-level-style-bullet text:level="6" text:bullet-char="">
        <style:list-level-properties text:space-before="1pt" text:min-label-width="17.01pt"/>
        <style:text-properties fo:color="#FFFFFF" fo:font-family="Wingdings" fo:font-size="45%"/>
      </text:list-level-style-bullet>
    </text:list-style>
    <text:list-style style:name="L35">
      <text:list-level-style-bullet text:level="7" text:bullet-char="">
        <style:list-level-properties text:space-before="1pt" text:min-label-width="17.01pt"/>
        <style:text-properties fo:color="#FFFFFF" fo:font-family="Wingdings" fo:font-size="45%"/>
      </text:list-level-style-bullet>
    </text:list-style>
    <text:list-style style:name="L36">
      <text:list-level-style-bullet text:level="1" text:bullet-char="">
        <style:list-level-properties text:space-before="1pt" text:min-label-width="25.51pt"/>
        <style:text-properties fo:color="#000000" fo:font-family="Wingdings" fo:font-size="45%"/>
      </text:list-level-style-bullet>
    </text:list-style>
    <text:list-style style:name="L37">
      <text:list-level-style-bullet text:level="2" text:bullet-char="">
        <style:list-level-properties text:space-before="1pt" text:min-label-width="25.51pt"/>
        <style:text-properties fo:color="#000000" fo:font-family="Symbol" fo:font-size="75%"/>
      </text:list-level-style-bullet>
    </text:list-style>
    <text:list-style style:name="L38">
      <text:list-level-style-bullet text:level="3" text:bullet-char="">
        <style:list-level-properties text:space-before="1pt" text:min-label-width="22.68pt"/>
        <style:text-properties fo:color="#000000" fo:font-family="Wingdings" fo:font-size="45%"/>
      </text:list-level-style-bullet>
    </text:list-style>
    <text:list-style style:name="L39">
      <text:list-level-style-bullet text:level="4" text:bullet-char="">
        <style:list-level-properties text:space-before="1pt" text:min-label-width="17.01pt"/>
        <style:text-properties fo:color="#000000" fo:font-family="Symbol" fo:font-size="75%"/>
      </text:list-level-style-bullet>
    </text:list-style>
    <text:list-style style:name="L40">
      <text:list-level-style-bullet text:level="5" text:bullet-char="">
        <style:list-level-properties text:space-before="1pt" text:min-label-width="17.01pt"/>
        <style:text-properties fo:color="#000000" fo:font-family="Wingdings" fo:font-size="45%"/>
      </text:list-level-style-bullet>
    </text:list-style>
    <text:list-style style:name="L41">
      <text:list-level-style-bullet text:level="6" text:bullet-char="">
        <style:list-level-properties text:space-before="1pt" text:min-label-width="17.01pt"/>
        <style:text-properties fo:color="#000000" fo:font-family="Wingdings" fo:font-size="45%"/>
      </text:list-level-style-bullet>
    </text:list-style>
    <text:list-style style:name="L42">
      <text:list-level-style-bullet text:level="7" text:bullet-char="">
        <style:list-level-properties text:space-before="1pt" text:min-label-width="17.01pt"/>
        <style:text-properties fo:color="#000000" fo:font-family="Wingdings" fo:font-size="45%"/>
      </text:list-level-style-bullet>
    </text:list-style>
    <text:list-style style:name="L43">
      <text:list-level-style-bullet text:level="1" text:bullet-char="">
        <style:list-level-properties text:space-before="1pt" text:min-label-width="25.51pt"/>
        <style:text-properties fo:color="#000000" fo:font-family="Wingdings" fo:font-size="45%"/>
      </text:list-level-style-bullet>
    </text:list-style>
    <text:list-style style:name="L44">
      <text:list-level-style-bullet text:level="2" text:bullet-char="">
        <style:list-level-properties text:space-before="1pt" text:min-label-width="25.51pt"/>
        <style:text-properties fo:color="#000000" fo:font-family="Symbol" fo:font-size="75%"/>
      </text:list-level-style-bullet>
    </text:list-style>
    <text:list-style style:name="L45">
      <text:list-level-style-bullet text:level="3" text:bullet-char="">
        <style:list-level-properties text:space-before="1pt" text:min-label-width="22.68pt"/>
        <style:text-properties fo:color="#000000" fo:font-family="Wingdings" fo:font-size="45%"/>
      </text:list-level-style-bullet>
    </text:list-style>
    <text:list-style style:name="L46">
      <text:list-level-style-bullet text:level="4" text:bullet-char="">
        <style:list-level-properties text:space-before="1pt" text:min-label-width="17.01pt"/>
        <style:text-properties fo:color="#000000" fo:font-family="Symbol" fo:font-size="75%"/>
      </text:list-level-style-bullet>
    </text:list-style>
    <text:list-style style:name="L47">
      <text:list-level-style-bullet text:level="5" text:bullet-char="">
        <style:list-level-properties text:space-before="1pt" text:min-label-width="17.01pt"/>
        <style:text-properties fo:color="#000000" fo:font-family="Wingdings" fo:font-size="45%"/>
      </text:list-level-style-bullet>
    </text:list-style>
    <text:list-style style:name="L48">
      <text:list-level-style-bullet text:level="6" text:bullet-char="">
        <style:list-level-properties text:space-before="1pt" text:min-label-width="17.01pt"/>
        <style:text-properties fo:color="#000000" fo:font-family="Wingdings" fo:font-size="45%"/>
      </text:list-level-style-bullet>
    </text:list-style>
    <text:list-style style:name="L49">
      <text:list-level-style-bullet text:level="7" text:bullet-char="">
        <style:list-level-properties text:space-before="1pt" text:min-label-width="17.01pt"/>
        <style:text-properties fo:color="#000000" fo:font-family="Wingdings" fo:font-size="45%"/>
      </text:list-level-style-bullet>
    </text:list-style>
  </office:styles>
  <office:automatic-styles>
    <style:page-layout style:name="Mpm1">
      <style:page-layout-properties fo:page-width="28cm" fo:page-height="15.75cm"/>
    </style:page-layout>
    <style:page-layout style:name="Mpm2">
      <style:page-layout-properties fo:page-width="28cm" fo:page-height="15.75cm"/>
    </style:page-layout>
    <style:page-layout style:name="Mpm3">
      <style:page-layout-properties fo:page-width="28cm" fo:page-height="15.75cm"/>
    </style:page-layout>
    <style:style style:family="drawing-page" style:name="dp1">
      <style:drawing-page-properties/>
    </style:style>
    <style:style style:family="paragraph" style:name="P1">
      <style:paragraph-properties fo:text-indent="0pt"/>
      <style:text-properties/>
    </style:style>
    <style:style style:family="text" style:name="T1">
      <style:text-properties fo:color="#FFFFFF" style:text-line-through-type="none" fo:font-family="Arial" fo:font-size="33pt" style:font-size-asian="33pt" style:font-size-complex="33pt" fo:language="en" fo:country="US" style:text-underline-type="none" fo:font-weight="normal"/>
    </style:style>
    <style:style style:family="paragraph" style:name="P2">
      <style:paragraph-properties fo:margin-left="34.02pt" fo:text-indent="-25.51pt" fo:margin-bottom="10.57pt"/>
      <style:text-properties/>
    </style:style>
    <style:style style:family="text" style:name="T2">
      <style:text-properties fo:color="#FFFFFF" style:text-line-through-type="none" fo:font-family="Arial" fo:font-size="24pt" style:font-size-asian="24pt" style:font-size-complex="24pt" fo:language="en" fo:country="US" style:text-underline-type="none" fo:font-weight="normal"/>
    </style:style>
    <style:style style:family="paragraph" style:name="P3">
      <style:paragraph-properties fo:margin-left="68.03pt" fo:text-indent="-25.51pt" fo:margin-bottom="8.45pt"/>
      <style:text-properties/>
    </style:style>
    <style:style style:family="text" style:name="T3">
      <style:text-properties fo:color="#FFFFFF" style:text-line-through-type="none" fo:font-family="Arial" fo:font-size="21pt" style:font-size-asian="21pt" style:font-size-complex="21pt" fo:language="en" fo:country="US" style:text-underline-type="none" fo:font-weight="normal"/>
    </style:style>
    <style:style style:family="paragraph" style:name="P4">
      <style:paragraph-properties fo:margin-left="102pt" fo:text-indent="-22.68pt" fo:margin-bottom="6.32pt"/>
      <style:text-properties/>
    </style:style>
    <style:style style:family="text" style:name="T4">
      <style:text-properties fo:color="#FFFFFF" style:text-line-through-type="none" fo:font-family="Arial" fo:font-size="18pt" style:font-size-asian="18pt" style:font-size-complex="18pt" fo:language="en" fo:country="US" style:text-underline-type="none" fo:font-weight="normal"/>
    </style:style>
    <style:style style:family="paragraph" style:name="P5">
      <style:paragraph-properties fo:margin-left="136.1pt" fo:text-indent="-17.01pt" fo:margin-bottom="4.25pt"/>
      <style:text-properties/>
    </style:style>
    <style:style style:family="text" style:name="T5">
      <style:text-properties fo:color="#FFFFFF" style:text-line-through-type="none" fo:font-family="Arial" fo:font-size="15pt" style:font-size-asian="15pt" style:font-size-complex="15pt" fo:language="en" fo:country="US" style:text-underline-type="none" fo:font-weight="normal"/>
    </style:style>
    <style:style style:family="paragraph" style:name="P6">
      <style:paragraph-properties fo:margin-left="170.1pt" fo:text-indent="-17.01pt" fo:margin-bottom="2.13pt"/>
      <style:text-properties/>
    </style:style>
    <style:style style:family="text" style:name="T6">
      <style:text-properties fo:color="#FFFFFF" style:text-line-through-type="none" fo:font-family="Arial" fo:font-size="15pt" style:font-size-asian="15pt" style:font-size-complex="15pt" fo:language="en" fo:country="US" style:text-underline-type="none" fo:font-weight="normal"/>
    </style:style>
    <style:style style:family="paragraph" style:name="P7">
      <style:paragraph-properties fo:margin-left="204.1pt" fo:text-indent="-17.01pt" fo:margin-bottom="2.13pt"/>
      <style:text-properties/>
    </style:style>
    <style:style style:family="text" style:name="T7">
      <style:text-properties fo:color="#FFFFFF" style:text-line-through-type="none" fo:font-family="Arial" fo:font-size="15pt" style:font-size-asian="15pt" style:font-size-complex="15pt" fo:language="en" fo:country="US" style:text-underline-type="none" fo:font-weight="normal"/>
    </style:style>
    <style:style style:family="paragraph" style:name="P8">
      <style:paragraph-properties fo:margin-left="238.1pt" fo:text-indent="-17.01pt" fo:margin-bottom="2.13pt"/>
      <style:text-properties/>
    </style:style>
    <style:style style:family="text" style:name="T8">
      <style:text-properties fo:color="#FFFFFF" style:text-line-through-type="none" fo:font-family="Arial" fo:font-size="15pt" style:font-size-asian="15pt" style:font-size-complex="15pt" fo:language="en" fo:country="US" style:text-underline-type="none" fo:font-weight="normal"/>
    </style:style>
    <style:style style:family="drawing-page" style:name="dp2">
      <style:drawing-page-properties/>
    </style:style>
    <style:style style:family="paragraph" style:name="P9">
      <style:paragraph-properties fo:text-indent="0pt"/>
      <style:text-properties/>
    </style:style>
    <style:style style:family="text" style:name="T9">
      <style:text-properties fo:color="#FFFFFF" style:text-line-through-type="none" fo:font-family="Arial" fo:font-size="33pt" style:font-size-asian="33pt" style:font-size-complex="33pt" fo:language="en" fo:country="US" style:text-underline-type="none" fo:font-weight="normal"/>
    </style:style>
    <style:style style:family="paragraph" style:name="P10">
      <style:paragraph-properties fo:margin-left="34.02pt" fo:text-indent="-25.51pt" fo:margin-bottom="10.57pt"/>
      <style:text-properties/>
    </style:style>
    <style:style style:family="text" style:name="T10">
      <style:text-properties fo:color="#FFFFFF" style:text-line-through-type="none" fo:font-family="Arial" fo:font-size="24pt" style:font-size-asian="24pt" style:font-size-complex="24pt" fo:language="en" fo:country="US" style:text-underline-type="none" fo:font-weight="normal"/>
    </style:style>
    <style:style style:family="paragraph" style:name="P11">
      <style:paragraph-properties fo:margin-left="68.03pt" fo:text-indent="-25.51pt" fo:margin-bottom="8.45pt"/>
      <style:text-properties/>
    </style:style>
    <style:style style:family="text" style:name="T11">
      <style:text-properties fo:color="#FFFFFF" style:text-line-through-type="none" fo:font-family="Arial" fo:font-size="21pt" style:font-size-asian="21pt" style:font-size-complex="21pt" fo:language="en" fo:country="US" style:text-underline-type="none" fo:font-weight="normal"/>
    </style:style>
    <style:style style:family="paragraph" style:name="P12">
      <style:paragraph-properties fo:margin-left="102pt" fo:text-indent="-22.68pt" fo:margin-bottom="6.32pt"/>
      <style:text-properties/>
    </style:style>
    <style:style style:family="text" style:name="T12">
      <style:text-properties fo:color="#FFFFFF" style:text-line-through-type="none" fo:font-family="Arial" fo:font-size="18pt" style:font-size-asian="18pt" style:font-size-complex="18pt" fo:language="en" fo:country="US" style:text-underline-type="none" fo:font-weight="normal"/>
    </style:style>
    <style:style style:family="paragraph" style:name="P13">
      <style:paragraph-properties fo:margin-left="136.1pt" fo:text-indent="-17.01pt" fo:margin-bottom="4.25pt"/>
      <style:text-properties/>
    </style:style>
    <style:style style:family="text" style:name="T13">
      <style:text-properties fo:color="#FFFFFF" style:text-line-through-type="none" fo:font-family="Arial" fo:font-size="15pt" style:font-size-asian="15pt" style:font-size-complex="15pt" fo:language="en" fo:country="US" style:text-underline-type="none" fo:font-weight="normal"/>
    </style:style>
    <style:style style:family="paragraph" style:name="P14">
      <style:paragraph-properties fo:margin-left="170.1pt" fo:text-indent="-17.01pt" fo:margin-bottom="2.13pt"/>
      <style:text-properties/>
    </style:style>
    <style:style style:family="text" style:name="T14">
      <style:text-properties fo:color="#FFFFFF" style:text-line-through-type="none" fo:font-family="Arial" fo:font-size="15pt" style:font-size-asian="15pt" style:font-size-complex="15pt" fo:language="en" fo:country="US" style:text-underline-type="none" fo:font-weight="normal"/>
    </style:style>
    <style:style style:family="paragraph" style:name="P15">
      <style:paragraph-properties fo:margin-left="204.1pt" fo:text-indent="-17.01pt" fo:margin-bottom="2.13pt"/>
      <style:text-properties/>
    </style:style>
    <style:style style:family="text" style:name="T15">
      <style:text-properties fo:color="#FFFFFF" style:text-line-through-type="none" fo:font-family="Arial" fo:font-size="15pt" style:font-size-asian="15pt" style:font-size-complex="15pt" fo:language="en" fo:country="US" style:text-underline-type="none" fo:font-weight="normal"/>
    </style:style>
    <style:style style:family="paragraph" style:name="P16">
      <style:paragraph-properties fo:margin-left="238.1pt" fo:text-indent="-17.01pt" fo:margin-bottom="2.13pt"/>
      <style:text-properties/>
    </style:style>
    <style:style style:family="text" style:name="T16">
      <style:text-properties fo:color="#FFFFFF" style:text-line-through-type="none" fo:font-family="Arial" fo:font-size="15pt" style:font-size-asian="15pt" style:font-size-complex="15pt" fo:language="en" fo:country="US" style:text-underline-type="none" fo:font-weight="normal"/>
    </style:style>
    <style:style style:family="drawing-page" style:name="dp3">
      <style:drawing-page-properties/>
    </style:style>
    <style:style style:family="paragraph" style:name="P17">
      <style:paragraph-properties fo:text-align="center" fo:text-indent="0pt"/>
      <style:text-properties/>
    </style:style>
    <style:style style:family="text" style:name="T17">
      <style:text-properties fo:color="#FFFFFF" style:text-line-through-type="none" fo:font-family="Arial" fo:font-size="33pt" style:font-size-asian="33pt" style:font-size-complex="33pt" fo:language="en" fo:country="US" style:text-underline-type="none" fo:font-weight="normal"/>
    </style:style>
    <style:style style:family="paragraph" style:name="P18">
      <style:paragraph-properties fo:margin-left="34.02pt" fo:text-indent="-25.51pt" fo:margin-bottom="10.57pt"/>
      <style:text-properties/>
    </style:style>
    <style:style style:family="text" style:name="T18">
      <style:text-properties fo:color="#000000" style:text-line-through-type="none" fo:font-family="Arial" fo:font-size="24pt" style:font-size-asian="24pt" style:font-size-complex="24pt" fo:language="en" fo:country="US" style:text-underline-type="none" fo:font-weight="normal"/>
    </style:style>
    <style:style style:family="paragraph" style:name="P19">
      <style:paragraph-properties fo:margin-left="68.03pt" fo:text-indent="-25.51pt" fo:margin-bottom="8.45pt"/>
      <style:text-properties/>
    </style:style>
    <style:style style:family="text" style:name="T19">
      <style:text-properties fo:color="#000000" style:text-line-through-type="none" fo:font-family="Arial" fo:font-size="21pt" style:font-size-asian="21pt" style:font-size-complex="21pt" fo:language="en" fo:country="US" style:text-underline-type="none" fo:font-weight="normal"/>
    </style:style>
    <style:style style:family="paragraph" style:name="P20">
      <style:paragraph-properties fo:margin-left="102pt" fo:text-indent="-22.68pt" fo:margin-bottom="6.32pt"/>
      <style:text-properties/>
    </style:style>
    <style:style style:family="text" style:name="T20">
      <style:text-properties fo:color="#000000" style:text-line-through-type="none" fo:font-family="Arial" fo:font-size="18pt" style:font-size-asian="18pt" style:font-size-complex="18pt" fo:language="en" fo:country="US" style:text-underline-type="none" fo:font-weight="normal"/>
    </style:style>
    <style:style style:family="paragraph" style:name="P21">
      <style:paragraph-properties fo:margin-left="136.1pt" fo:text-indent="-17.01pt" fo:margin-bottom="4.25pt"/>
      <style:text-properties/>
    </style:style>
    <style:style style:family="text" style:name="T21">
      <style:text-properties fo:color="#000000" style:text-line-through-type="none" fo:font-family="Arial" fo:font-size="15pt" style:font-size-asian="15pt" style:font-size-complex="15pt" fo:language="en" fo:country="US" style:text-underline-type="none" fo:font-weight="normal"/>
    </style:style>
    <style:style style:family="paragraph" style:name="P22">
      <style:paragraph-properties fo:margin-left="170.1pt" fo:text-indent="-17.01pt" fo:margin-bottom="2.13pt"/>
      <style:text-properties/>
    </style:style>
    <style:style style:family="text" style:name="T22">
      <style:text-properties fo:color="#000000" style:text-line-through-type="none" fo:font-family="Arial" fo:font-size="15pt" style:font-size-asian="15pt" style:font-size-complex="15pt" fo:language="en" fo:country="US" style:text-underline-type="none" fo:font-weight="normal"/>
    </style:style>
    <style:style style:family="paragraph" style:name="P23">
      <style:paragraph-properties fo:margin-left="204.1pt" fo:text-indent="-17.01pt" fo:margin-bottom="2.13pt"/>
      <style:text-properties/>
    </style:style>
    <style:style style:family="text" style:name="T23">
      <style:text-properties fo:color="#000000" style:text-line-through-type="none" fo:font-family="Arial" fo:font-size="15pt" style:font-size-asian="15pt" style:font-size-complex="15pt" fo:language="en" fo:country="US" style:text-underline-type="none" fo:font-weight="normal"/>
    </style:style>
    <style:style style:family="paragraph" style:name="P24">
      <style:paragraph-properties fo:margin-left="238.1pt" fo:text-indent="-17.01pt" fo:margin-bottom="2.13pt"/>
      <style:text-properties/>
    </style:style>
    <style:style style:family="text" style:name="T24">
      <style:text-properties fo:color="#000000" style:text-line-through-type="none" fo:font-family="Arial" fo:font-size="15pt" style:font-size-asian="15pt" style:font-size-complex="15pt" fo:language="en" fo:country="US" style:text-underline-type="none" fo:font-weight="normal"/>
    </style:style>
    <style:style style:family="drawing-page" style:name="dp4">
      <style:drawing-page-properties/>
    </style:style>
    <style:style style:family="paragraph" style:name="P25">
      <style:paragraph-properties fo:text-align="center" fo:text-indent="0pt"/>
      <style:text-properties/>
    </style:style>
    <style:style style:family="text" style:name="T25">
      <style:text-properties fo:color="#FFFFFF" style:text-line-through-type="none" fo:font-family="Arial" fo:font-size="33pt" style:font-size-asian="33pt" style:font-size-complex="33pt" fo:language="en" fo:country="US" style:text-underline-type="none" fo:font-weight="normal"/>
    </style:style>
    <style:style style:family="paragraph" style:name="P26">
      <style:paragraph-properties fo:margin-left="34.02pt" fo:text-indent="-25.51pt" fo:margin-bottom="10.6pt"/>
      <style:text-properties/>
    </style:style>
    <style:style style:family="text" style:name="T26">
      <style:text-properties fo:color="#000000" style:text-line-through-type="none" fo:font-family="Arial" fo:font-size="24pt" style:font-size-asian="24pt" style:font-size-complex="24pt" fo:language="en" fo:country="US" style:text-underline-type="none" fo:font-weight="normal"/>
    </style:style>
    <style:style style:family="paragraph" style:name="P27">
      <style:paragraph-properties fo:margin-left="68.03pt" fo:text-indent="-25.51pt" fo:margin-bottom="8.5pt"/>
      <style:text-properties/>
    </style:style>
    <style:style style:family="text" style:name="T27">
      <style:text-properties fo:color="#000000" style:text-line-through-type="none" fo:font-family="Arial" fo:font-size="21pt" style:font-size-asian="21pt" style:font-size-complex="21pt" fo:language="en" fo:country="US" style:text-underline-type="none" fo:font-weight="normal"/>
    </style:style>
    <style:style style:family="paragraph" style:name="P28">
      <style:paragraph-properties fo:margin-left="102pt" fo:text-indent="-22.68pt" fo:margin-bottom="6.35pt"/>
      <style:text-properties/>
    </style:style>
    <style:style style:family="text" style:name="T28">
      <style:text-properties fo:color="#000000" style:text-line-through-type="none" fo:font-family="Arial" fo:font-size="18pt" style:font-size-asian="18pt" style:font-size-complex="18pt" fo:language="en" fo:country="US" style:text-underline-type="none" fo:font-weight="normal"/>
    </style:style>
    <style:style style:family="paragraph" style:name="P29">
      <style:paragraph-properties fo:margin-left="136.1pt" fo:text-indent="-17.01pt" fo:margin-bottom="4.25pt"/>
      <style:text-properties/>
    </style:style>
    <style:style style:family="text" style:name="T29">
      <style:text-properties fo:color="#000000" style:text-line-through-type="none" fo:font-family="Arial" fo:font-size="15pt" style:font-size-asian="15pt" style:font-size-complex="15pt" fo:language="en" fo:country="US" style:text-underline-type="none" fo:font-weight="normal"/>
    </style:style>
    <style:style style:family="paragraph" style:name="P30">
      <style:paragraph-properties fo:margin-left="170.1pt" fo:text-indent="-17.01pt" fo:margin-bottom="2.13pt"/>
      <style:text-properties/>
    </style:style>
    <style:style style:family="text" style:name="T30">
      <style:text-properties fo:color="#000000" style:text-line-through-type="none" fo:font-family="Arial" fo:font-size="15pt" style:font-size-asian="15pt" style:font-size-complex="15pt" fo:language="en" fo:country="US" style:text-underline-type="none" fo:font-weight="normal"/>
    </style:style>
    <style:style style:family="paragraph" style:name="P31">
      <style:paragraph-properties fo:margin-left="204.1pt" fo:text-indent="-17.01pt" fo:margin-bottom="2.13pt"/>
      <style:text-properties/>
    </style:style>
    <style:style style:family="text" style:name="T31">
      <style:text-properties fo:color="#000000" style:text-line-through-type="none" fo:font-family="Arial" fo:font-size="15pt" style:font-size-asian="15pt" style:font-size-complex="15pt" fo:language="en" fo:country="US" style:text-underline-type="none" fo:font-weight="normal"/>
    </style:style>
    <style:style style:family="paragraph" style:name="P32">
      <style:paragraph-properties fo:margin-left="238.1pt" fo:text-indent="-17.01pt" fo:margin-bottom="2.13pt"/>
      <style:text-properties fo:font-family="Arial" style:font-family-asian="DejaVu Sans" style:font-family-complex="DejaVu Sans"/>
    </style:style>
    <style:style style:family="text" style:name="T32">
      <style:text-properties fo:color="#000000" style:text-line-through-type="none" fo:font-family="Arial" fo:font-size="15pt" style:font-size-asian="15pt" style:font-size-complex="15pt" fo:language="en" fo:country="US" style:text-underline-type="none" fo:font-weight="normal"/>
    </style:style>
    <style:style style:family="drawing-page" style:name="dp5">
      <style:drawing-page-properties/>
    </style:style>
    <style:style style:family="graphic" style:name="gr2">
      <style:graphic-properties draw:fill="gradient" draw:fill-gradient-name="Gradient1" draw:textarea-vertical-align="top" draw:auto-grow-height="true" draw:fit-to-size="false" style:shrink-to-fit="false" draw:stroke="none" svg:stroke-width="0cm" fo:wrap-option="no-wrap" style:wrap="run-through" fo:border="0cm none #000000" fo:padding-top="0pt" fo:padding-bottom="0pt" fo:padding-left="0pt" fo:padding-right="0pt" fo:background-color="transparent"/>
    </style:style>
    <style:style style:family="presentation" style:name="pr1">
      <style:graphic-properties draw:fill="none" draw:textarea-vertical-align="middle" draw:auto-grow-height="false" draw:auto-grow-width="false" draw:stroke="none" svg:stroke-width="0cm" style:wrap="run-through" fo:border="0cm none #000000" fo:padding-top="0pt" fo:padding-bottom="0pt" fo:padding-left="0pt" fo:padding-right="0pt" fo:background-color="transparent"/>
    </style:style>
    <style:style style:family="paragraph" style:name="P33">
      <style:paragraph-properties/>
      <style:text-properties/>
    </style:style>
    <style:style style:family="paragraph" style:name="P34">
      <style:paragraph-properties fo:text-indent="0pt"/>
      <style:text-properties/>
    </style:style>
    <style:style style:family="text" style:name="T33">
      <style:text-properties fo:color="#FFFFFF" style:text-line-through-type="none" fo:font-family="Arial" fo:font-size="33pt" style:font-size-asian="33pt" style:font-size-complex="33pt" fo:language="en" fo:country="US" style:text-underline-type="none" fo:font-weight="normal"/>
    </style:style>
    <style:style style:family="presentation" style:name="pr2">
      <style:graphic-properties draw:fill="none" draw:textarea-vertical-align="top" draw:auto-grow-height="false" draw:auto-grow-width="false" draw:stroke="none" svg:stroke-width="0cm" style:wrap="run-through" fo:border="0cm none #000000" fo:padding-top="0pt" fo:padding-bottom="0pt" fo:padding-left="0pt" fo:padding-right="0pt" fo:background-color="transparent"/>
    </style:style>
    <style:style style:family="paragraph" style:name="P35">
      <style:paragraph-properties/>
      <style:text-properties/>
    </style:style>
    <style:style style:family="paragraph" style:name="P36">
      <style:paragraph-properties fo:margin-left="34.02pt" fo:text-indent="-25.51pt" fo:margin-bottom="10.57pt"/>
      <style:text-properties/>
    </style:style>
    <style:style style:family="text" style:name="T34">
      <style:text-properties fo:color="#FFFFFF" style:text-line-through-type="none" fo:font-family="Arial" fo:font-size="24pt" style:font-size-asian="24pt" style:font-size-complex="24pt" fo:language="en" fo:country="US" style:text-underline-type="none" fo:font-weight="normal"/>
    </style:style>
    <style:style style:family="paragraph" style:name="P37">
      <style:paragraph-properties fo:margin-left="68.03pt" fo:text-indent="-25.51pt" fo:margin-bottom="8.45pt"/>
      <style:text-properties/>
    </style:style>
    <style:style style:family="text" style:name="T35">
      <style:text-properties fo:color="#FFFFFF" style:text-line-through-type="none" fo:font-family="Arial" fo:font-size="21pt" style:font-size-asian="21pt" style:font-size-complex="21pt" fo:language="en" fo:country="US" style:text-underline-type="none" fo:font-weight="normal"/>
    </style:style>
    <style:style style:family="paragraph" style:name="P38">
      <style:paragraph-properties fo:margin-left="102pt" fo:text-indent="-22.68pt" fo:margin-bottom="6.32pt"/>
      <style:text-properties/>
    </style:style>
    <style:style style:family="text" style:name="T36">
      <style:text-properties fo:color="#FFFFFF" style:text-line-through-type="none" fo:font-family="Arial" fo:font-size="18pt" style:font-size-asian="18pt" style:font-size-complex="18pt" fo:language="en" fo:country="US" style:text-underline-type="none" fo:font-weight="normal"/>
    </style:style>
    <style:style style:family="paragraph" style:name="P39">
      <style:paragraph-properties fo:margin-left="136.1pt" fo:text-indent="-17.01pt" fo:margin-bottom="4.25pt"/>
      <style:text-properties/>
    </style:style>
    <style:style style:family="text" style:name="T37">
      <style:text-properties fo:color="#FFFFFF" style:text-line-through-type="none" fo:font-family="Arial" fo:font-size="15pt" style:font-size-asian="15pt" style:font-size-complex="15pt" fo:language="en" fo:country="US" style:text-underline-type="none" fo:font-weight="normal"/>
    </style:style>
    <style:style style:family="paragraph" style:name="P40">
      <style:paragraph-properties fo:margin-left="170.1pt" fo:text-indent="-17.01pt" fo:margin-bottom="2.13pt"/>
      <style:text-properties/>
    </style:style>
    <style:style style:family="text" style:name="T38">
      <style:text-properties fo:color="#FFFFFF" style:text-line-through-type="none" fo:font-family="Arial" fo:font-size="15pt" style:font-size-asian="15pt" style:font-size-complex="15pt" fo:language="en" fo:country="US" style:text-underline-type="none" fo:font-weight="normal"/>
    </style:style>
    <style:style style:family="paragraph" style:name="P41">
      <style:paragraph-properties fo:margin-left="204.1pt" fo:text-indent="-17.01pt" fo:margin-bottom="2.13pt"/>
      <style:text-properties/>
    </style:style>
    <style:style style:family="text" style:name="T39">
      <style:text-properties fo:color="#FFFFFF" style:text-line-through-type="none" fo:font-family="Arial" fo:font-size="15pt" style:font-size-asian="15pt" style:font-size-complex="15pt" fo:language="en" fo:country="US" style:text-underline-type="none" fo:font-weight="normal"/>
    </style:style>
    <style:style style:family="paragraph" style:name="P42">
      <style:paragraph-properties fo:margin-left="238.1pt" fo:text-indent="-17.01pt" fo:margin-bottom="2.13pt"/>
      <style:text-properties fo:font-family="Arial" style:font-family-asian="DejaVu Sans" style:font-family-complex="DejaVu Sans"/>
    </style:style>
    <style:style style:family="text" style:name="T40">
      <style:text-properties fo:color="#FFFFFF" style:text-line-through-type="none" fo:font-family="Arial" fo:font-size="15pt" style:font-size-asian="15pt" style:font-size-complex="15pt" fo:language="en" fo:country="US" style:text-underline-type="none" fo:font-weight="normal"/>
    </style:style>
    <style:style style:family="graphic" style:name="gr3">
      <style:graphic-properties draw:fill-color="#FFFFFF" draw:fill="solid" draw:opacity="29.8039%" draw:textarea-vertical-align="top" draw:auto-grow-height="false" draw:auto-grow-width="false" draw:stroke="none" svg:stroke-width="0cm" fo:wrap-option="no-wrap" style:wrap="run-through" fo:padding-top="0pt" fo:padding-bottom="0pt" fo:padding-left="0pt" fo:padding-right="0pt"/>
    </style:style>
    <style:style style:family="graphic" style:name="gr4">
      <style:graphic-properties draw:fill-color="#FFFFFF" draw:fill="solid" draw:opacity="29.8039%" draw:textarea-vertical-align="top" draw:auto-grow-height="false" draw:auto-grow-width="false" draw:stroke="none" svg:stroke-width="0cm" fo:wrap-option="no-wrap" style:wrap="run-through" fo:padding-top="0pt" fo:padding-bottom="0pt" fo:padding-left="0pt" fo:padding-right="0pt"/>
    </style:style>
    <style:style style:family="graphic" style:name="gr5">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6">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7">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8">
      <style:graphic-properties draw:fill-color="#FFFFFF" draw:fill="solid" draw:opacity="9.80392%" draw:textarea-vertical-align="top" draw:auto-grow-height="false" draw:auto-grow-width="false" draw:stroke="none" svg:stroke-width="0cm" fo:wrap-option="no-wrap" style:wrap="run-through" fo:padding-top="0pt" fo:padding-bottom="0pt" fo:padding-left="0pt" fo:padding-right="0pt"/>
    </style:style>
    <style:style style:family="graphic" style:name="gr9">
      <style:graphic-properties draw:fill-color="#FFFFFF" draw:fill="solid" draw:opacity="14.902%" draw:textarea-vertical-align="top" draw:auto-grow-height="false" draw:auto-grow-width="false" draw:stroke="none" svg:stroke-width="0cm" fo:wrap-option="no-wrap" style:wrap="run-through" fo:padding-top="0pt" fo:padding-bottom="0pt" fo:padding-left="0pt" fo:padding-right="0pt"/>
    </style:style>
    <style:style style:family="graphic" style:name="gr10">
      <style:graphic-properties draw:fill-color="#FFFFFF" draw:fill="solid" draw:opacity="29.8039%" draw:textarea-vertical-align="top" draw:auto-grow-height="false" draw:auto-grow-width="false" draw:stroke="none" svg:stroke-width="0cm" fo:wrap-option="no-wrap" style:wrap="run-through" fo:padding-top="0pt" fo:padding-bottom="0pt" fo:padding-left="0pt" fo:padding-right="0pt"/>
    </style:style>
    <style:style style:family="graphic" style:name="gr11">
      <style:graphic-properties draw:fill-color="#FFFFFF" draw:fill="solid" draw:opacity="9.80392%" draw:textarea-vertical-align="top" draw:auto-grow-height="false" draw:auto-grow-width="false" draw:stroke="none" svg:stroke-width="0cm" fo:wrap-option="no-wrap" style:wrap="run-through" fo:padding-top="0pt" fo:padding-bottom="0pt" fo:padding-left="0pt" fo:padding-right="0pt"/>
    </style:style>
    <style:style style:family="graphic" style:name="gr12">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13">
      <style:graphic-properties draw:fill-color="#FFFFFF" draw:fill="solid" draw:opacity="24.7059%" draw:textarea-vertical-align="top" draw:auto-grow-height="false" draw:auto-grow-width="false" draw:stroke="none" svg:stroke-width="0cm" fo:wrap-option="no-wrap" style:wrap="run-through" fo:padding-top="0pt" fo:padding-bottom="0pt" fo:padding-left="0pt" fo:padding-right="0pt"/>
    </style:style>
    <style:style style:family="drawing-page" style:name="dp7">
      <style:drawing-page-properties/>
    </style:style>
    <style:style style:family="graphic" style:name="gr14">
      <style:graphic-properties draw:fill="gradient" draw:fill-gradient-name="Gradient2" draw:textarea-vertical-align="top" draw:auto-grow-height="true" draw:fit-to-size="false" style:shrink-to-fit="false" draw:stroke="none" svg:stroke-width="0cm" fo:wrap-option="no-wrap" style:wrap="run-through" fo:border="0cm none #000000" fo:padding-top="0pt" fo:padding-bottom="0pt" fo:padding-left="0pt" fo:padding-right="0pt" fo:background-color="transparent"/>
    </style:style>
    <style:style style:family="graphic" style:name="gr15">
      <style:graphic-properties draw:fill="gradient" draw:fill-gradient-name="Gradient3" draw:opacity-name="Opacity1" draw:textarea-vertical-align="top" draw:auto-grow-height="false" draw:auto-grow-width="false" draw:stroke="none" svg:stroke-width="0cm" fo:wrap-option="no-wrap" style:wrap="run-through" fo:border="0cm none #000000" fo:padding-top="0pt" fo:padding-bottom="0pt" fo:padding-left="0pt" fo:padding-right="0pt" fo:background-color="transparent"/>
    </style:style>
    <style:style style:family="graphic" style:name="gr16">
      <style:graphic-properties draw:fill-color="#FFFFFF" draw:fill="solid" draw:opacity="29.8039%" draw:textarea-vertical-align="top" draw:auto-grow-height="false" draw:auto-grow-width="false" draw:stroke="none" svg:stroke-width="0cm" fo:wrap-option="no-wrap" style:wrap="run-through" fo:padding-top="0pt" fo:padding-bottom="0pt" fo:padding-left="0pt" fo:padding-right="0pt"/>
    </style:style>
    <style:style style:family="graphic" style:name="gr17">
      <style:graphic-properties draw:fill-color="#FFFFFF" draw:fill="solid" draw:opacity="29.8039%" draw:textarea-vertical-align="top" draw:auto-grow-height="false" draw:auto-grow-width="false" draw:stroke="none" svg:stroke-width="0cm" fo:wrap-option="no-wrap" style:wrap="run-through" fo:padding-top="0pt" fo:padding-bottom="0pt" fo:padding-left="0pt" fo:padding-right="0pt"/>
    </style:style>
    <style:style style:family="graphic" style:name="gr18">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19">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20">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21">
      <style:graphic-properties draw:fill-color="#FFFFFF" draw:fill="solid" draw:opacity="9.80392%" draw:textarea-vertical-align="top" draw:auto-grow-height="false" draw:auto-grow-width="false" draw:stroke="none" svg:stroke-width="0cm" fo:wrap-option="no-wrap" style:wrap="run-through" fo:padding-top="0pt" fo:padding-bottom="0pt" fo:padding-left="0pt" fo:padding-right="0pt"/>
    </style:style>
    <style:style style:family="graphic" style:name="gr22">
      <style:graphic-properties draw:fill-color="#FFFFFF" draw:fill="solid" draw:opacity="14.902%" draw:textarea-vertical-align="top" draw:auto-grow-height="false" draw:auto-grow-width="false" draw:stroke="none" svg:stroke-width="0cm" fo:wrap-option="no-wrap" style:wrap="run-through" fo:padding-top="0pt" fo:padding-bottom="0pt" fo:padding-left="0pt" fo:padding-right="0pt"/>
    </style:style>
    <style:style style:family="graphic" style:name="gr23">
      <style:graphic-properties draw:fill-color="#FFFFFF" draw:fill="solid" draw:opacity="29.8039%" draw:textarea-vertical-align="top" draw:auto-grow-height="false" draw:auto-grow-width="false" draw:stroke="none" svg:stroke-width="0cm" fo:wrap-option="no-wrap" style:wrap="run-through" fo:padding-top="0pt" fo:padding-bottom="0pt" fo:padding-left="0pt" fo:padding-right="0pt"/>
    </style:style>
    <style:style style:family="graphic" style:name="gr24">
      <style:graphic-properties draw:fill-color="#FFFFFF" draw:fill="solid" draw:opacity="9.80392%" draw:textarea-vertical-align="top" draw:auto-grow-height="false" draw:auto-grow-width="false" draw:stroke="none" svg:stroke-width="0cm" fo:wrap-option="no-wrap" style:wrap="run-through" fo:padding-top="0pt" fo:padding-bottom="0pt" fo:padding-left="0pt" fo:padding-right="0pt"/>
    </style:style>
    <style:style style:family="graphic" style:name="gr25">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graphic" style:name="gr26">
      <style:graphic-properties draw:fill-color="#FFFFFF" draw:fill="solid" draw:opacity="9.80392%" draw:textarea-vertical-align="top" draw:auto-grow-height="false" draw:auto-grow-width="false" draw:stroke="none" svg:stroke-width="0cm" fo:wrap-option="no-wrap" style:wrap="run-through" fo:padding-top="0pt" fo:padding-bottom="0pt" fo:padding-left="0pt" fo:padding-right="0pt"/>
    </style:style>
    <style:style style:family="presentation" style:name="pr5">
      <style:graphic-properties draw:fill="none" draw:textarea-vertical-align="middle" draw:auto-grow-height="false" draw:auto-grow-width="false" draw:stroke="none" svg:stroke-width="0cm" style:wrap="run-through" fo:border="0cm none #000000" fo:padding-top="0pt" fo:padding-bottom="0pt" fo:padding-left="0pt" fo:padding-right="0pt" fo:background-color="transparent"/>
    </style:style>
    <style:style style:family="paragraph" style:name="P47">
      <style:paragraph-properties/>
      <style:text-properties/>
    </style:style>
    <style:style style:family="paragraph" style:name="P48">
      <style:paragraph-properties fo:text-align="center" fo:text-indent="0pt"/>
      <style:text-properties/>
    </style:style>
    <style:style style:family="text" style:name="T43">
      <style:text-properties fo:color="#FFFFFF" style:text-line-through-type="none" fo:font-family="Arial" fo:font-size="33pt" style:font-size-asian="33pt" style:font-size-complex="33pt" fo:language="en" fo:country="US" style:text-underline-type="none" fo:font-weight="normal"/>
    </style:style>
    <style:style style:family="presentation" style:name="pr6">
      <style:graphic-properties draw:fill-color="#FFFFFF" draw:fill="solid" draw:opacity="49.8039%" draw:textarea-vertical-align="top" draw:auto-grow-height="false" draw:auto-grow-width="false" draw:stroke="none" svg:stroke-width="0cm" style:wrap="run-through" fo:border="0cm none #000000" fo:padding-top="0pt" fo:padding-bottom="0pt" fo:padding-left="0pt" fo:padding-right="0pt" fo:background-color="transparent"/>
    </style:style>
    <style:style style:family="paragraph" style:name="P49">
      <style:paragraph-properties/>
      <style:text-properties/>
    </style:style>
    <style:style style:family="paragraph" style:name="P50">
      <style:paragraph-properties fo:margin-left="34.02pt" fo:text-indent="-25.51pt" fo:margin-bottom="10.57pt"/>
      <style:text-properties/>
    </style:style>
    <style:style style:family="text" style:name="T44">
      <style:text-properties fo:color="#000000" style:text-line-through-type="none" fo:font-family="Arial" fo:font-size="24pt" style:font-size-asian="24pt" style:font-size-complex="24pt" fo:language="en" fo:country="US" style:text-underline-type="none" fo:font-weight="normal"/>
    </style:style>
    <style:style style:family="paragraph" style:name="P51">
      <style:paragraph-properties fo:margin-left="68.03pt" fo:text-indent="-25.51pt" fo:margin-bottom="8.45pt"/>
      <style:text-properties/>
    </style:style>
    <style:style style:family="text" style:name="T45">
      <style:text-properties fo:color="#000000" style:text-line-through-type="none" fo:font-family="Arial" fo:font-size="21pt" style:font-size-asian="21pt" style:font-size-complex="21pt" fo:language="en" fo:country="US" style:text-underline-type="none" fo:font-weight="normal"/>
    </style:style>
    <style:style style:family="paragraph" style:name="P52">
      <style:paragraph-properties fo:margin-left="102pt" fo:text-indent="-22.68pt" fo:margin-bottom="6.32pt"/>
      <style:text-properties/>
    </style:style>
    <style:style style:family="text" style:name="T46">
      <style:text-properties fo:color="#000000" style:text-line-through-type="none" fo:font-family="Arial" fo:font-size="18pt" style:font-size-asian="18pt" style:font-size-complex="18pt" fo:language="en" fo:country="US" style:text-underline-type="none" fo:font-weight="normal"/>
    </style:style>
    <style:style style:family="paragraph" style:name="P53">
      <style:paragraph-properties fo:margin-left="136.1pt" fo:text-indent="-17.01pt" fo:margin-bottom="4.25pt"/>
      <style:text-properties/>
    </style:style>
    <style:style style:family="text" style:name="T47">
      <style:text-properties fo:color="#000000" style:text-line-through-type="none" fo:font-family="Arial" fo:font-size="15pt" style:font-size-asian="15pt" style:font-size-complex="15pt" fo:language="en" fo:country="US" style:text-underline-type="none" fo:font-weight="normal"/>
    </style:style>
    <style:style style:family="paragraph" style:name="P54">
      <style:paragraph-properties fo:margin-left="170.1pt" fo:text-indent="-17.01pt" fo:margin-bottom="2.13pt"/>
      <style:text-properties/>
    </style:style>
    <style:style style:family="text" style:name="T48">
      <style:text-properties fo:color="#000000" style:text-line-through-type="none" fo:font-family="Arial" fo:font-size="15pt" style:font-size-asian="15pt" style:font-size-complex="15pt" fo:language="en" fo:country="US" style:text-underline-type="none" fo:font-weight="normal"/>
    </style:style>
    <style:style style:family="paragraph" style:name="P55">
      <style:paragraph-properties fo:margin-left="204.1pt" fo:text-indent="-17.01pt" fo:margin-bottom="2.13pt"/>
      <style:text-properties/>
    </style:style>
    <style:style style:family="text" style:name="T49">
      <style:text-properties fo:color="#000000" style:text-line-through-type="none" fo:font-family="Arial" fo:font-size="15pt" style:font-size-asian="15pt" style:font-size-complex="15pt" fo:language="en" fo:country="US" style:text-underline-type="none" fo:font-weight="normal"/>
    </style:style>
    <style:style style:family="paragraph" style:name="P56">
      <style:paragraph-properties fo:margin-left="238.1pt" fo:text-indent="-17.01pt" fo:margin-bottom="2.13pt"/>
      <style:text-properties fo:font-family="Arial" style:font-family-asian="DejaVu Sans" style:font-family-complex="DejaVu Sans"/>
    </style:style>
    <style:style style:family="text" style:name="T50">
      <style:text-properties fo:color="#000000" style:text-line-through-type="none" fo:font-family="Arial" fo:font-size="15pt" style:font-size-asian="15pt" style:font-size-complex="15pt" fo:language="en" fo:country="US" style:text-underline-type="none" fo:font-weight="normal"/>
    </style:style>
    <style:style style:family="drawing-page" style:name="dp9">
      <style:drawing-page-properties/>
    </style:style>
    <style:style style:family="graphic" style:name="gr28">
      <style:graphic-properties draw:fill="gradient" draw:fill-gradient-name="Gradient4" draw:textarea-vertical-align="top" draw:auto-grow-height="true" draw:fit-to-size="false" style:shrink-to-fit="false" draw:stroke="none" svg:stroke-width="0cm" fo:wrap-option="no-wrap" style:wrap="run-through" fo:border="0cm none #000000" fo:padding-top="0pt" fo:padding-bottom="0pt" fo:padding-left="0pt" fo:padding-right="0pt" fo:background-color="transparent"/>
    </style:style>
    <style:style style:family="graphic" style:name="gr29">
      <style:graphic-properties draw:fill="gradient" draw:fill-gradient-name="Gradient5" draw:opacity-name="Opacity2" draw:textarea-vertical-align="top" draw:auto-grow-height="false" draw:auto-grow-width="false" draw:stroke="none" svg:stroke-width="0cm" fo:wrap-option="no-wrap" style:wrap="run-through" fo:border="0cm none #000000" fo:padding-top="0pt" fo:padding-bottom="0pt" fo:padding-left="0pt" fo:padding-right="0pt" fo:background-color="transparent"/>
    </style:style>
    <style:style style:family="graphic" style:name="gr30">
      <style:graphic-properties draw:fill-color="#FFFFFF" draw:fill="solid" draw:textarea-vertical-align="top" draw:auto-grow-height="false" draw:auto-grow-width="false" draw:stroke="none" svg:stroke-width="0cm" fo:wrap-option="no-wrap" style:wrap="run-through" fo:border="0cm none #000000" fo:padding-top="0pt" fo:padding-bottom="0pt" fo:padding-left="0pt" fo:padding-right="0pt" fo:background-color="transparent"/>
    </style:style>
    <style:style style:family="graphic" style:name="gr31">
      <style:graphic-properties draw:fill-color="#FFFFFF" draw:fill="solid" draw:opacity="29.8039%" draw:textarea-vertical-align="top" draw:auto-grow-height="false" draw:auto-grow-width="false" draw:stroke="none" svg:stroke-width="0cm" fo:wrap-option="no-wrap" style:wrap="run-through" fo:padding-top="0pt" fo:padding-bottom="0pt" fo:padding-left="0pt" fo:padding-right="0pt"/>
    </style:style>
    <style:style style:family="graphic" style:name="gr32">
      <style:graphic-properties draw:fill-color="#FFFFFF" draw:fill="solid" draw:opacity="20%" draw:textarea-vertical-align="top" draw:auto-grow-height="false" draw:auto-grow-width="false" draw:stroke="none" svg:stroke-width="0cm" fo:wrap-option="no-wrap" style:wrap="run-through" fo:padding-top="0pt" fo:padding-bottom="0pt" fo:padding-left="0pt" fo:padding-right="0pt"/>
    </style:style>
    <style:style style:family="presentation" style:name="pr9">
      <style:graphic-properties draw:fill="none" draw:textarea-vertical-align="middle" draw:auto-grow-height="false" draw:auto-grow-width="false" draw:stroke="none" svg:stroke-width="0cm" style:wrap="run-through" fo:border="0cm none #000000" fo:padding-top="0pt" fo:padding-bottom="0pt" fo:padding-left="0pt" fo:padding-right="0pt" fo:background-color="transparent"/>
    </style:style>
    <style:style style:family="paragraph" style:name="P61">
      <style:paragraph-properties/>
      <style:text-properties/>
    </style:style>
    <style:style style:family="paragraph" style:name="P62">
      <style:paragraph-properties fo:text-align="center" fo:text-indent="0pt"/>
      <style:text-properties/>
    </style:style>
    <style:style style:family="text" style:name="T52">
      <style:text-properties fo:color="#FFFFFF" style:text-line-through-type="none" fo:font-family="Arial" fo:font-size="33pt" style:font-size-asian="33pt" style:font-size-complex="33pt" fo:language="en" fo:country="US" style:text-underline-type="none" fo:font-weight="normal"/>
    </style:style>
    <style:style style:family="presentation" style:name="pr10">
      <style:graphic-properties draw:fill="none" draw:textarea-vertical-align="top" draw:auto-grow-height="false" draw:auto-grow-width="false" draw:stroke="none" svg:stroke-width="0cm" style:wrap="run-through" fo:border="0cm none #000000" fo:padding-top="0pt" fo:padding-bottom="0pt" fo:padding-left="0pt" fo:padding-right="0pt" fo:background-color="transparent"/>
    </style:style>
    <style:style style:family="paragraph" style:name="P63">
      <style:paragraph-properties/>
      <style:text-properties/>
    </style:style>
    <style:style style:family="paragraph" style:name="P64">
      <style:paragraph-properties fo:margin-left="34.02pt" fo:text-indent="-25.51pt" fo:margin-bottom="10.6pt"/>
      <style:text-properties/>
    </style:style>
    <style:style style:family="text" style:name="T53">
      <style:text-properties fo:color="#000000" style:text-line-through-type="none" fo:font-family="Arial" fo:font-size="24pt" style:font-size-asian="24pt" style:font-size-complex="24pt" fo:language="en" fo:country="US" style:text-underline-type="none" fo:font-weight="normal"/>
    </style:style>
    <style:style style:family="paragraph" style:name="P65">
      <style:paragraph-properties fo:margin-left="68.03pt" fo:text-indent="-25.51pt" fo:margin-bottom="8.5pt"/>
      <style:text-properties/>
    </style:style>
    <style:style style:family="text" style:name="T54">
      <style:text-properties fo:color="#000000" style:text-line-through-type="none" fo:font-family="Arial" fo:font-size="21pt" style:font-size-asian="21pt" style:font-size-complex="21pt" fo:language="en" fo:country="US" style:text-underline-type="none" fo:font-weight="normal"/>
    </style:style>
    <style:style style:family="paragraph" style:name="P66">
      <style:paragraph-properties fo:margin-left="102pt" fo:text-indent="-22.68pt" fo:margin-bottom="6.35pt"/>
      <style:text-properties/>
    </style:style>
    <style:style style:family="text" style:name="T55">
      <style:text-properties fo:color="#000000" style:text-line-through-type="none" fo:font-family="Arial" fo:font-size="18pt" style:font-size-asian="18pt" style:font-size-complex="18pt" fo:language="en" fo:country="US" style:text-underline-type="none" fo:font-weight="normal"/>
    </style:style>
    <style:style style:family="paragraph" style:name="P67">
      <style:paragraph-properties fo:margin-left="136.1pt" fo:text-indent="-17.01pt" fo:margin-bottom="4.25pt"/>
      <style:text-properties/>
    </style:style>
    <style:style style:family="text" style:name="T56">
      <style:text-properties fo:color="#000000" style:text-line-through-type="none" fo:font-family="Arial" fo:font-size="15pt" style:font-size-asian="15pt" style:font-size-complex="15pt" fo:language="en" fo:country="US" style:text-underline-type="none" fo:font-weight="normal"/>
    </style:style>
    <style:style style:family="paragraph" style:name="P68">
      <style:paragraph-properties fo:margin-left="170.1pt" fo:text-indent="-17.01pt" fo:margin-bottom="2.13pt"/>
      <style:text-properties/>
    </style:style>
    <style:style style:family="text" style:name="T57">
      <style:text-properties fo:color="#000000" style:text-line-through-type="none" fo:font-family="Arial" fo:font-size="15pt" style:font-size-asian="15pt" style:font-size-complex="15pt" fo:language="en" fo:country="US" style:text-underline-type="none" fo:font-weight="normal"/>
    </style:style>
    <style:style style:family="paragraph" style:name="P69">
      <style:paragraph-properties fo:margin-left="204.1pt" fo:text-indent="-17.01pt" fo:margin-bottom="2.13pt"/>
      <style:text-properties/>
    </style:style>
    <style:style style:family="text" style:name="T58">
      <style:text-properties fo:color="#000000" style:text-line-through-type="none" fo:font-family="Arial" fo:font-size="15pt" style:font-size-asian="15pt" style:font-size-complex="15pt" fo:language="en" fo:country="US" style:text-underline-type="none" fo:font-weight="normal"/>
    </style:style>
    <style:style style:family="paragraph" style:name="P70">
      <style:paragraph-properties fo:margin-left="238.1pt" fo:text-indent="-17.01pt" fo:margin-bottom="2.13pt"/>
      <style:text-properties/>
    </style:style>
    <style:style style:family="text" style:name="T59">
      <style:text-properties fo:color="#000000" style:text-line-through-type="none" fo:font-family="Arial" fo:font-size="15pt" style:font-size-asian="15pt" style:font-size-complex="15pt" fo:language="en" fo:country="US" style:text-underline-type="none" fo:font-weight="normal"/>
    </style:style>
  </office:automatic-styles>
  <office:master-styles>
    <draw:layer-set>
      <draw:layer draw:name="layout"/>
      <draw:layer draw:name="background"/>
      <draw:layer draw:name="backgroundobjects"/>
      <draw:layer draw:name="controls"/>
      <draw:layer draw:name="measurelines"/>
    </draw:layer-set>
    <style:master-page style:name="Office_Lights" style:page-layout-name="Mpm1" draw:style-name="dp5">
      <draw:frame xml:id="id1" draw:id="id1" draw:style-name="gr2" svg:width="28cm" svg:height="15.75cm" svg:x="0cm" svg:y="0cm">
        <draw:text-box fo:min-height="15.75cm">
          <text:p><text:span text:style-name="T32"/></text:p>
        </draw:text-box>
      </draw:frame>
      <draw:frame xml:id="id2" draw:id="id2" draw:name="PlaceHolder 1" draw:text-style-name="P33" draw:layer="backgroundobjects" presentation:style-name="pr1" presentation:class="title" presentation:placeholder="false" presentation:user-transformed="true" svg:width="25cm" svg:height="2.75cm" svg:x="1.5cm" svg:y="4cm">
        <draw:text-box fo:min-height="2.75cm">
          <text:p text:style-name="P34"><text:span text:style-name="T33">Click to edit the title text format</text:span></text:p>
        </draw:text-box>
      </draw:frame>
      <draw:frame xml:id="id3" draw:id="id3" draw:name="PlaceHolder 2" draw:text-style-name="P35" draw:layer="backgroundobjects" presentation:style-name="pr2" presentation:class="outline" presentation:placeholder="false" presentation:user-transformed="true" svg:width="25cm" svg:height="6cm" svg:x="1.5cm" svg:y="7.25cm">
        <draw:text-box fo:min-height="6cm">
          <text:list text:style-name="L29" text:continue-numbering="true">
            <text:list-item>
              <text:p text:style-name="P36"><text:span text:style-name="T34">Click to edit the outline text format</text:span></text:p>
              <text:list text:style-name="L30" text:continue-numbering="true">
                <text:list-item>
                  <text:p text:style-name="P37"><text:span text:style-name="T35">Second Outline Level</text:span></text:p>
                  <text:list text:style-name="L31" text:continue-numbering="true">
                    <text:list-item>
                      <text:p text:style-name="P38"><text:span text:style-name="T36">Third Outline Level</text:span></text:p>
                      <text:list text:style-name="L32" text:continue-numbering="true">
                        <text:list-item>
                          <text:p text:style-name="P39"><text:span text:style-name="T37">Fourth Outline Level</text:span></text:p>
                          <text:list text:style-name="L33" text:continue-numbering="true">
                            <text:list-item>
                              <text:p text:style-name="P40"><text:span text:style-name="T38">Fifth Outline Level</text:span></text:p>
                              <text:list text:style-name="L34" text:continue-numbering="true">
                                <text:list-item>
                                  <text:p text:style-name="P41"><text:span text:style-name="T39">Sixth Outline Level</text:span></text:p>
                                  <text:list text:style-name="L35" text:continue-numbering="true">
                                    <text:list-item>
                                      <text:p text:style-name="P42"><text:span text:style-name="T40">Seventh Outline Level</text:span></text:p>
                                    </text:list-item>
                                  </text:list>
                                </text:list-item>
                              </text:list>
                            </text:list-item>
                          </text:list>
                        </text:list-item>
                      </text:list>
                    </text:list-item>
                  </text:list>
                </text:list-item>
              </text:list>
            </text:list-item>
          </text:list>
        </draw:text-box>
      </draw:frame>
      <draw:custom-shape xml:id="id4" draw:id="id4" draw:style-name="gr3" svg:width="4cm" svg:height="3.5cm" svg:x="4cm" svg:y="3cm">
        <text:p><text:span text:style-name="T40"/></text:p>
        <draw:enhanced-geometry svg:viewBox="0 0 21600 21600" draw:type="circle" draw:enhanced-path="U 10800 10800 10800 10800 0 360 Z N"/>
      </draw:custom-shape>
      <draw:custom-shape xml:id="id5" draw:id="id5" draw:style-name="gr4" svg:width="4cm" svg:height="3.5cm" svg:x="20.5cm" svg:y="11cm">
        <text:p><text:span text:style-name="T40"/></text:p>
        <draw:enhanced-geometry svg:viewBox="0 0 21600 21600" draw:type="circle" draw:enhanced-path="U 10800 10800 10800 10800 0 360 Z N"/>
      </draw:custom-shape>
      <draw:custom-shape xml:id="id6" draw:id="id6" draw:style-name="gr5" svg:width="3.5cm" svg:height="3cm" svg:x="25cm" svg:y="7.5cm">
        <text:p><text:span text:style-name="T40"/></text:p>
        <draw:enhanced-geometry svg:viewBox="0 0 21600 21600" draw:type="circle" draw:enhanced-path="U 10800 10800 10800 10800 0 360 Z N"/>
      </draw:custom-shape>
      <draw:custom-shape xml:id="id7" draw:id="id7" draw:style-name="gr6" svg:width="4cm" svg:height="3.75cm" svg:x="-0.5cm" svg:y="6.75cm">
        <text:p><text:span text:style-name="T40"/></text:p>
        <draw:enhanced-geometry svg:viewBox="0 0 21600 21600" draw:type="circle" draw:enhanced-path="U 10800 10800 10800 10800 0 360 Z N"/>
      </draw:custom-shape>
      <draw:custom-shape xml:id="id8" draw:id="id8" draw:style-name="gr7" svg:width="2cm" svg:height="2cm" svg:x="1.5cm" svg:y="3cm">
        <text:p><text:span text:style-name="T40"/></text:p>
        <draw:enhanced-geometry svg:viewBox="0 0 21600 21600" draw:type="circle" draw:enhanced-path="U 10800 10800 10800 10800 0 360 Z N"/>
      </draw:custom-shape>
      <draw:custom-shape xml:id="id9" draw:id="id9" draw:style-name="gr8" svg:width="2cm" svg:height="2cm" svg:x="0cm" svg:y="3.5cm">
        <text:p><text:span text:style-name="T40"/></text:p>
        <draw:enhanced-geometry svg:viewBox="0 0 21600 21600" draw:type="circle" draw:enhanced-path="U 10800 10800 10800 10800 0 360 Z N"/>
      </draw:custom-shape>
      <draw:custom-shape xml:id="id10" draw:id="id10" draw:style-name="gr9" svg:width="4.5cm" svg:height="3.5cm" svg:x="0cm" svg:y="14.5cm">
        <text:p><text:span text:style-name="T40"/></text:p>
        <draw:enhanced-geometry svg:viewBox="0 0 21600 21600" draw:type="circle" draw:enhanced-path="U 10800 10800 10800 10800 0 360 Z N"/>
      </draw:custom-shape>
      <draw:custom-shape xml:id="id11" draw:id="id11" draw:style-name="gr10" svg:width="2cm" svg:height="2cm" svg:x="27cm" svg:y="13cm">
        <text:p><text:span text:style-name="T40"/></text:p>
        <draw:enhanced-geometry svg:viewBox="0 0 21600 21600" draw:type="circle" draw:enhanced-path="U 10800 10800 10800 10800 0 360 Z N"/>
      </draw:custom-shape>
      <draw:custom-shape xml:id="id12" draw:id="id12" draw:style-name="gr11" svg:width="2cm" svg:height="2cm" svg:x="26.5cm" svg:y="9.501cm">
        <text:p><text:span text:style-name="T40"/></text:p>
        <draw:enhanced-geometry svg:viewBox="0 0 21600 21600" draw:type="circle" draw:enhanced-path="U 10800 10800 10800 10800 0 360 Z N"/>
      </draw:custom-shape>
      <draw:custom-shape xml:id="id13" draw:id="id13" draw:style-name="gr12" svg:width="3cm" svg:height="2.34cm" svg:x="22.5cm" svg:y="13cm">
        <text:p><text:span text:style-name="T40"/></text:p>
        <draw:enhanced-geometry svg:viewBox="0 0 21600 21600" draw:type="circle" draw:enhanced-path="U 10800 10800 10800 10800 0 360 Z N"/>
      </draw:custom-shape>
      <draw:custom-shape xml:id="id14" draw:id="id14" draw:style-name="gr13" svg:width="2.5cm" svg:height="2.5cm" svg:x="22cm" svg:y="15cm">
        <text:p><text:span text:style-name="T40"/></text:p>
        <draw:enhanced-geometry svg:viewBox="0 0 21600 21600" draw:type="circle" draw:enhanced-path="U 10800 10800 10800 10800 0 360 Z N"/>
      </draw:custom-shape>
    </style:master-page>
    <style:master-page style:name="Office_Lights1" style:page-layout-name="Mpm2" draw:style-name="dp7">
      <draw:frame xml:id="id17" draw:id="id17" draw:style-name="gr14" svg:width="28cm" svg:height="15.75cm" svg:x="0cm" svg:y="0cm">
        <draw:text-box fo:min-height="15.75cm">
          <text:p><text:span text:style-name="T40"/></text:p>
        </draw:text-box>
      </draw:frame>
      <draw:frame xml:id="id18" draw:id="id18" draw:style-name="gr15" svg:width="28cm" svg:height="15.75cm" svg:x="0cm" svg:y="0cm">
        <draw:text-box fo:min-height="15.75cm">
          <text:p><text:span text:style-name="T40"/></text:p>
        </draw:text-box>
      </draw:frame>
      <draw:custom-shape xml:id="id19" draw:id="id19" draw:style-name="gr16" svg:width="4cm" svg:height="3.5cm" svg:x="4cm" svg:y="3cm">
        <text:p><text:span text:style-name="T40"/></text:p>
        <draw:enhanced-geometry svg:viewBox="0 0 21600 21600" draw:type="circle" draw:enhanced-path="U 10800 10800 10800 10800 0 360 Z N"/>
      </draw:custom-shape>
      <draw:custom-shape xml:id="id20" draw:id="id20" draw:style-name="gr17" svg:width="4cm" svg:height="3.5cm" svg:x="20.5cm" svg:y="11cm">
        <text:p><text:span text:style-name="T40"/></text:p>
        <draw:enhanced-geometry svg:viewBox="0 0 21600 21600" draw:type="circle" draw:enhanced-path="U 10800 10800 10800 10800 0 360 Z N"/>
      </draw:custom-shape>
      <draw:custom-shape xml:id="id21" draw:id="id21" draw:style-name="gr18" svg:width="3.5cm" svg:height="3cm" svg:x="25cm" svg:y="7.5cm">
        <text:p><text:span text:style-name="T40"/></text:p>
        <draw:enhanced-geometry svg:viewBox="0 0 21600 21600" draw:type="circle" draw:enhanced-path="U 10800 10800 10800 10800 0 360 Z N"/>
      </draw:custom-shape>
      <draw:custom-shape xml:id="id22" draw:id="id22" draw:style-name="gr19" svg:width="4cm" svg:height="3.75cm" svg:x="-0.5cm" svg:y="6.75cm">
        <text:p><text:span text:style-name="T40"/></text:p>
        <draw:enhanced-geometry svg:viewBox="0 0 21600 21600" draw:type="circle" draw:enhanced-path="U 10800 10800 10800 10800 0 360 Z N"/>
      </draw:custom-shape>
      <draw:custom-shape xml:id="id23" draw:id="id23" draw:style-name="gr20" svg:width="2cm" svg:height="2cm" svg:x="1.5cm" svg:y="3cm">
        <text:p><text:span text:style-name="T40"/></text:p>
        <draw:enhanced-geometry svg:viewBox="0 0 21600 21600" draw:type="circle" draw:enhanced-path="U 10800 10800 10800 10800 0 360 Z N"/>
      </draw:custom-shape>
      <draw:custom-shape xml:id="id24" draw:id="id24" draw:style-name="gr21" svg:width="2cm" svg:height="2cm" svg:x="0cm" svg:y="3.5cm">
        <text:p><text:span text:style-name="T40"/></text:p>
        <draw:enhanced-geometry svg:viewBox="0 0 21600 21600" draw:type="circle" draw:enhanced-path="U 10800 10800 10800 10800 0 360 Z N"/>
      </draw:custom-shape>
      <draw:custom-shape xml:id="id25" draw:id="id25" draw:style-name="gr22" svg:width="4.5cm" svg:height="3.5cm" svg:x="0cm" svg:y="14.5cm">
        <text:p><text:span text:style-name="T40"/></text:p>
        <draw:enhanced-geometry svg:viewBox="0 0 21600 21600" draw:type="circle" draw:enhanced-path="U 10800 10800 10800 10800 0 360 Z N"/>
      </draw:custom-shape>
      <draw:custom-shape xml:id="id26" draw:id="id26" draw:style-name="gr23" svg:width="2cm" svg:height="2cm" svg:x="27cm" svg:y="13cm">
        <text:p><text:span text:style-name="T40"/></text:p>
        <draw:enhanced-geometry svg:viewBox="0 0 21600 21600" draw:type="circle" draw:enhanced-path="U 10800 10800 10800 10800 0 360 Z N"/>
      </draw:custom-shape>
      <draw:custom-shape xml:id="id27" draw:id="id27" draw:style-name="gr24" svg:width="2cm" svg:height="2cm" svg:x="26.5cm" svg:y="9.502cm">
        <text:p><text:span text:style-name="T40"/></text:p>
        <draw:enhanced-geometry svg:viewBox="0 0 21600 21600" draw:type="circle" draw:enhanced-path="U 10800 10800 10800 10800 0 360 Z N"/>
      </draw:custom-shape>
      <draw:custom-shape xml:id="id28" draw:id="id28" draw:style-name="gr25" svg:width="3cm" svg:height="2.34cm" svg:x="22.5cm" svg:y="13cm">
        <text:p><text:span text:style-name="T40"/></text:p>
        <draw:enhanced-geometry svg:viewBox="0 0 21600 21600" draw:type="circle" draw:enhanced-path="U 10800 10800 10800 10800 0 360 Z N"/>
      </draw:custom-shape>
      <draw:custom-shape xml:id="id29" draw:id="id29" draw:style-name="gr26" svg:width="2.5cm" svg:height="2.5cm" svg:x="22cm" svg:y="15cm">
        <text:p><text:span text:style-name="T40"/></text:p>
        <draw:enhanced-geometry svg:viewBox="0 0 21600 21600" draw:type="circle" draw:enhanced-path="U 10800 10800 10800 10800 0 360 Z N"/>
      </draw:custom-shape>
      <draw:frame xml:id="id30" draw:id="id30" draw:name="PlaceHolder 1" draw:text-style-name="P47" draw:layer="backgroundobjects" presentation:style-name="pr5" presentation:class="title" presentation:placeholder="false" presentation:user-transformed="true" svg:width="25cm" svg:height="2.75cm" svg:x="1.5cm" svg:y="0.75cm">
        <draw:text-box fo:min-height="2.75cm">
          <text:p text:style-name="P48"><text:span text:style-name="T43">Click to edit the title text format</text:span></text:p>
        </draw:text-box>
      </draw:frame>
      <draw:frame xml:id="id31" draw:id="id31" draw:name="PlaceHolder 2" draw:text-style-name="P49" draw:layer="backgroundobjects" presentation:style-name="pr6" presentation:class="outline" presentation:placeholder="false" presentation:user-transformed="true" svg:width="25cm" svg:height="10cm" svg:x="1.5cm" svg:y="4cm">
        <draw:text-box fo:min-height="10cm">
          <text:list text:style-name="L36" text:continue-numbering="true">
            <text:list-item>
              <text:p text:style-name="P50"><text:span text:style-name="T44">Click to edit the outline text format</text:span></text:p>
              <text:list text:style-name="L37" text:continue-numbering="true">
                <text:list-item>
                  <text:p text:style-name="P51"><text:span text:style-name="T45">Second Outline Level</text:span></text:p>
                  <text:list text:style-name="L38" text:continue-numbering="true">
                    <text:list-item>
                      <text:p text:style-name="P52"><text:span text:style-name="T46">Third Outline Level</text:span></text:p>
                      <text:list text:style-name="L39" text:continue-numbering="true">
                        <text:list-item>
                          <text:p text:style-name="P53"><text:span text:style-name="T47">Fourth Outline Level</text:span></text:p>
                          <text:list text:style-name="L40" text:continue-numbering="true">
                            <text:list-item>
                              <text:p text:style-name="P54"><text:span text:style-name="T48">Fifth Outline Level</text:span></text:p>
                              <text:list text:style-name="L41" text:continue-numbering="true">
                                <text:list-item>
                                  <text:p text:style-name="P55"><text:span text:style-name="T49">Sixth Outline Level</text:span></text:p>
                                  <text:list text:style-name="L42" text:continue-numbering="true">
                                    <text:list-item>
                                      <text:p text:style-name="P56"><text:span text:style-name="T50">Seventh Outline Level</text:span></text:p>
                                    </text:list-item>
                                  </text:list>
                                </text:list-item>
                              </text:list>
                            </text:list-item>
                          </text:list>
                        </text:list-item>
                      </text:list>
                    </text:list-item>
                  </text:list>
                </text:list-item>
              </text:list>
            </text:list-item>
          </text:list>
        </draw:text-box>
      </draw:frame>
    </style:master-page>
    <style:master-page style:name="Office_Lights2" style:page-layout-name="Mpm3" draw:style-name="dp9">
      <draw:frame xml:id="id35" draw:id="id35" draw:style-name="gr28" svg:width="28cm" svg:height="15.75cm" svg:x="0cm" svg:y="0cm">
        <draw:text-box fo:min-height="15.75cm">
          <text:p><text:span text:style-name="T50"/></text:p>
        </draw:text-box>
      </draw:frame>
      <draw:frame xml:id="id36" draw:id="id36" draw:style-name="gr29" svg:width="28cm" svg:height="15.75cm" svg:x="0cm" svg:y="0cm">
        <draw:text-box fo:min-height="15.75cm">
          <text:p><text:span text:style-name="T50"/></text:p>
        </draw:text-box>
      </draw:frame>
      <draw:frame xml:id="id37" draw:id="id37" draw:style-name="gr30" svg:width="28cm" svg:height="12.25cm" svg:x="0cm" svg:y="3.5cm">
        <draw:text-box fo:min-height="12.25cm">
          <text:p><text:span text:style-name="T50"/></text:p>
        </draw:text-box>
      </draw:frame>
      <draw:custom-shape xml:id="id38" draw:id="id38" draw:style-name="gr31" svg:width="4cm" svg:height="3.5cm" svg:x="4cm" svg:y="3cm">
        <text:p><text:span text:style-name="T50"/></text:p>
        <draw:enhanced-geometry svg:viewBox="0 0 21600 21600" draw:type="circle" draw:enhanced-path="U 10800 10800 10800 10800 0 360 Z N"/>
      </draw:custom-shape>
      <draw:custom-shape xml:id="id39" draw:id="id39" draw:style-name="gr32" svg:width="2cm" svg:height="2cm" svg:x="1.5cm" svg:y="3cm">
        <text:p><text:span text:style-name="T50"/></text:p>
        <draw:enhanced-geometry svg:viewBox="0 0 21600 21600" draw:type="circle" draw:enhanced-path="U 10800 10800 10800 10800 0 360 Z N"/>
      </draw:custom-shape>
      <draw:frame xml:id="id40" draw:id="id40" draw:name="PlaceHolder 1" draw:text-style-name="P61" draw:layer="backgroundobjects" presentation:style-name="pr9" presentation:class="title" presentation:placeholder="false" presentation:user-transformed="true" svg:width="25cm" svg:height="2.75cm" svg:x="1.5cm" svg:y="0.75cm">
        <draw:text-box fo:min-height="2.75cm">
          <text:p text:style-name="P62"><text:span text:style-name="T52">Click to edit the title text format</text:span></text:p>
        </draw:text-box>
      </draw:frame>
      <draw:frame xml:id="id41" draw:id="id41" draw:name="PlaceHolder 2" draw:text-style-name="P63" draw:layer="backgroundobjects" presentation:style-name="pr10" presentation:class="outline" presentation:placeholder="false" presentation:user-transformed="true" svg:width="25cm" svg:height="10cm" svg:x="1.5cm" svg:y="4cm">
        <draw:text-box fo:min-height="10cm">
          <text:list text:style-name="L43" text:continue-numbering="true">
            <text:list-item>
              <text:p text:style-name="P64"><text:span text:style-name="T53">Click to edit the outline text format</text:span></text:p>
              <text:list text:style-name="L44" text:continue-numbering="true">
                <text:list-item>
                  <text:p text:style-name="P65"><text:span text:style-name="T54">Second Outline Level</text:span></text:p>
                  <text:list text:style-name="L45" text:continue-numbering="true">
                    <text:list-item>
                      <text:p text:style-name="P66"><text:span text:style-name="T55">Third Outline Level</text:span></text:p>
                      <text:list text:style-name="L46" text:continue-numbering="true">
                        <text:list-item>
                          <text:p text:style-name="P67"><text:span text:style-name="T56">Fourth Outline Level</text:span></text:p>
                          <text:list text:style-name="L47" text:continue-numbering="true">
                            <text:list-item>
                              <text:p text:style-name="P68"><text:span text:style-name="T57">Fifth Outline Level</text:span></text:p>
                              <text:list text:style-name="L48" text:continue-numbering="true">
                                <text:list-item>
                                  <text:p text:style-name="P69"><text:span text:style-name="T58">Sixth Outline Level</text:span></text:p>
                                  <text:list text:style-name="L49" text:continue-numbering="true">
                                    <text:list-item>
                                      <text:p text:style-name="P70"><text:span text:style-name="T59">Seventh Outline Level</text:span></text:p>
                                    </text:list-item>
                                  </text:list>
                                </text:list-item>
                              </text:list>
                            </text:list-item>
                          </text:list>
                        </text:list-item>
                      </text:list>
                    </text:list-item>
                  </text:list>
                </text:list-item>
              </text:list>
            </text:list-item>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5.565.0</meta:generator>
    <dc:creator/>
    <meta:creation-date>2026-03-09T08:46:09Z</meta:creation-date>
    <dc:title>Lights</dc:title>
    <dc:description>This work is licensed under a Creative Commons 0 License.
It makes use of the works of kka_libo_design@ashisuto.co.jp.</dc:description>
    <dc:language>en-US</dc:language>
  </office:meta>
</office:document-meta>
</file>