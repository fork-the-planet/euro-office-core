
<file path=META-INF/manifest.xml><?xml version="1.0" encoding="utf-8"?>
<manifest:manifest xmlns:manifest="urn:oasis:names:tc:opendocument:xmlns:manifest:1.0">
  <manifest:file-entry manifest:full-path="Pictures/image1.jpe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BodyText" style:master-page-name="MasterPage2" style:family="paragraph" style:name="P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
      <style:text-properties fo:font-family="DejaVu Sans"/>
    </style:style>
    <style:style style:parent-style-name="BodyText" style:family="paragraph" style:name="P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
      <style:text-properties fo:color="#800080" fo:font-family="DejaVu Sans"/>
    </style:style>
    <style:style style:parent-style-name="BodyText" style:family="paragraph" style:name="P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
      <style:text-properties fo:font-family="Liberation Mono"/>
    </style:style>
    <style:style style:parent-style-name="BodyText" style:family="paragraph" style:name="P1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
      <style:text-properties fo:color="#5983b0" fo:font-family="Liberation Mono"/>
    </style:style>
    <style:style style:parent-style-name="BodyText" style:family="paragraph" style:name="P1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fo:font-style="italic" style:text-underline-type="single" style:text-underline-style="solid" style:text-underline-width="auto" style:text-underline-color="font-color" fo:font-weight="bold" style:letter-kerning="true"/>
    </style:style>
    <style:style style:family="text" style:name="T5">
      <style:text-properties fo:font-family="DejaVu Sans" fo:font-style="italic" style:text-underline-type="single" style:text-underline-style="solid" style:text-underline-width="auto" style:text-underline-color="font-color" fo:font-weight="bold"/>
    </style:style>
    <style:style style:parent-style-name="BodyText" style:family="paragraph" style:name="P1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
      <style:text-properties fo:font-family="DejaVu Sans"/>
    </style:style>
    <style:style style:parent-style-name="Graphics" style:family="graphic" style:name="gr3">
      <style:graphic-properties draw:fill="none" style:repeat="stretch" style:wrap="dynamic" fo:margin-left="0cm" fo:margin-right="0cm" fo:margin-top="0cm" fo:margin-bottom="0cm" style:horizontal-pos="center" style:horizontal-rel="char" style:vertical-pos="from-top" style:vertical-rel="paragraph" fo:background-color="transparent"/>
    </style:style>
    <style:style style:parent-style-name="BodyText" style:family="paragraph" style:name="P1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7">
      <style:text-properties fo:font-family="DejaVu Sans"/>
    </style:style>
    <style:style style:parent-style-name="BodyText" style:family="paragraph" style:name="P1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8">
      <style:text-properties fo:font-family="OpenSymbol"/>
    </style:style>
    <style:style style:parent-style-name="Graphics" style:family="graphic" style:name="gr4">
      <style:graphic-properties draw:fill="none" style:repeat="stretch" style:wrap="dynamic" fo:margin-left="0cm" fo:margin-right="0cm" fo:margin-top="0cm" fo:margin-bottom="0cm" style:horizontal-pos="from-left" style:horizontal-rel="char" style:vertical-pos="from-top" style:vertical-rel="paragraph" fo:background-color="transparent"/>
    </style:style>
    <style:style style:family="text" style:name="T9">
      <style:text-properties fo:font-family="OpenSymbol"/>
    </style:style>
    <style:style style:parent-style-name="BodyText" style:family="paragraph" style:name="P1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0">
      <style:text-properties fo:font-family="DejaVu Sans"/>
    </style:style>
    <style:style style:parent-style-name="Graphics" style:family="graphic" style:name="gr5">
      <style:graphic-properties draw:fill="none" style:repeat="stretch" style:wrap="parallel" fo:margin-left="0cm" fo:margin-right="0cm" fo:margin-top="0cm" fo:margin-bottom="0cm" style:horizontal-pos="from-left" style:horizontal-rel="char" style:vertical-pos="from-top" style:vertical-rel="paragraph" fo:background-color="transparent"/>
    </style:style>
    <style:style style:family="text" style:name="T11">
      <style:text-properties fo:font-family="DejaVu Sans"/>
    </style:style>
    <style:style style:parent-style-name="BodyText" style:family="paragraph" style:name="P1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2">
      <style:text-properties fo:font-family="DejaVu Sans"/>
    </style:style>
    <style:style style:parent-style-name="BodyText" style:family="paragraph" style:name="P1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3">
      <style:text-properties fo:font-family="DejaVu Sans"/>
    </style:style>
    <style:style style:parent-style-name="BodyText" style:family="paragraph" style:name="P18">
      <style:paragraph-properties fo:text-align="start" fo:margin-top="0pt" fo:margin-bottom="7p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4">
      <style:text-properties fo:font-family="DejaVu Sans"/>
    </style:style>
  </office:automatic-styles>
  <office:body>
    <office:text text:use-soft-page-breaks="true">
      <text:p text:style-name="P7"><text:span text:style-name="T1">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span></text:p>
      <text:p text:style-name="P8"><text:span text:style-name="T2">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 </text:span></text:p>
      <text:p text:style-name="P9"><text:span text:style-name="T3">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 Fusce placerat efficitur purus. </text:span></text:p>
      <text:p text:style-name="P10"><text:span text:style-name="T4">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span></text:p>
      <text:p text:style-name="P11"><text:span text:style-name="T5">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quam. Mauris consequat quis urna eget auctor. Duis convallis consectetur imperdiet. Morbi varius arcu id erat mollis ultricies.</text:span></text:p>
      <text:p text:style-name="P12"><text:span text:style-name="T6"/><draw:frame draw:name="Image1" draw:style-name="gr3" draw:z-index="3" svg:width="10.58cm" svg:height="7.938cm" svg:x="0cm" svg:y="0.001764cm"><draw:image xlink:href="Pictures/image1.jpeg" xlink:type="simple" xlink:show="embed" xlink:actuate="onLoad"/></draw:frame></text:p>
      <text:p text:style-name="P13"><text:span text:style-name="T7"/></text:p>
      <text:p text:style-name="P14"><text:span text:style-name="T8">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text:span><text:span/><draw:frame draw:name="Image2" draw:style-name="gr4" draw:z-index="4" text:anchor-type="paragraph" svg:width="10.58cm" svg:height="7.936cm" svg:x="-0.09702cm" svg:y="8.785cm"><draw:image xlink:href="Pictures/image2.png" xlink:type="simple" xlink:show="embed" xlink:actuate="onLoad"/></draw:frame><text:span text:style-name="T9">lacinia nec, cursus a nisi. Nulla facilisi. Proin mollis dapibus urna, eget viverra nisl gravida condimentum. Maecenas mattis velit sapien. </text:span></text:p>
      <text:p text:style-name="P15"><text:span text:style-name="T10">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text:span><text:span/><draw:frame draw:name="Image3" draw:style-name="gr5" draw:z-index="5" text:anchor-type="paragraph" svg:width="10.58cm" svg:height="7.938cm" svg:x="2.071cm" svg:y="13.98cm"><draw:image xlink:href="Pictures/image2.png" xlink:type="simple" xlink:show="embed" xlink:actuate="onLoad"/></draw:frame><text:span text:style-name="T11">ngue lacus imperdiet tincidunt. Pellentesque habitant morbi tristique senectus et netus et malesuada fames ac turpis egestas. </text:span></text:p>
      <text:p text:style-name="P16"><text:span text:style-name="T12">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span></text:p>
      <text:p text:style-name="P17"><text:span text:style-name="T13">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span></text:p>
      <text:p text:style-name="P18"><text:span text:style-name="T14">Sed quis mi quis odio eleifend interdum. Donec pellentesque ex ac felis vestibulum, sit amet luctus erat dignissim. Phasellus bibendum nunc lacus, eget accumsan libero placerat sed. Proin eget libero quis ipsum accums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family="Liberation Serif" style:font-family-asian="Noto Serif CJK SC" style:font-family-complex="Noto Sans Devanagari" fo:font-size="12pt" style:font-size-complex="12pt" fo:language="en" style:language-complex="hi" fo:country="US" style:country-complex="IN" style:letter-kerning="true"/>
    </style:default-style>
    <style:default-style style:family="text">
      <style:text-properties fo:font-family="Liberation Serif" style:font-family-asian="Noto Serif CJK SC" style:font-family-complex="Noto Sans Devanagari" fo:font-size="12pt" style:font-size-complex="12pt" fo:language="en" style:language-complex="hi" fo:country="US" style:country-complex="IN" style:letter-kerning="true"/>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Normal">
      <style:paragraph-properties fo:text-align="end"/>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parent-style-name="Normal" style:display-name="Heading" style:family="paragraph" style:name="Heading">
      <style:paragraph-properties fo:margin-top="12pt" fo:margin-bottom="6pt"/>
      <style:text-properties fo:font-family="Liberation Sans" style:font-family-asian="Noto Sans CJK SC" style:font-family-complex="Noto Sans Devanagari" fo:font-size="14pt" style:font-size-complex="14pt"/>
    </style:style>
    <style:style style:parent-style-name="Normal" style:display-name="Body Text" style:family="paragraph" style:name="BodyText">
      <style:paragraph-properties fo:line-height="115%" fo:margin-top="0pt" fo:margin-bottom="7pt"/>
      <style:text-properties/>
    </style:style>
    <style:style style:parent-style-name="BodyText" style:display-name="List" style:family="paragraph" style:name="List">
      <style:paragraph-properties/>
      <style:text-properties style:font-family-complex="Noto Sans Devanagari"/>
    </style:style>
    <style:style style:parent-style-name="Normal" style:display-name="caption" style:family="paragraph" style:name="Caption">
      <style:paragraph-properties fo:margin-top="6pt" fo:margin-bottom="6pt"/>
      <style:text-properties style:font-family-complex="Noto Sans Devanagari" fo:font-size="12pt" style:font-size-complex="12pt" fo:font-style="italic"/>
    </style:style>
    <style:style style:parent-style-name="Normal" style:display-name="Index" style:family="paragraph" style:name="Index">
      <style:paragraph-properties/>
      <style:text-properties style:font-family-complex="Noto Sans Devanagari"/>
    </style:style>
  </office:styles>
  <office:automatic-styles>
    <style:page-layout style:name="Mpm1">
      <style:page-layout-properties fo:page-width="21cm" fo:page-height="29.7cm" fo:margin-top="2cm" fo:margin-bottom="0cm" fo:margin-left="2cm" fo:margin-right="2cm"/>
    </style:page-layout>
    <style:page-layout style:name="Mpm2">
      <style:page-layout-properties fo:page-width="21cm" fo:page-height="29.7cm" fo:margin-top="2cm" fo:margin-bottom="0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meta:creation-date>2026-02-18T09:32:31Z</meta:creation-date>
    <dc:title/>
    <dc:description/>
    <dc:language>en-US</dc:language>
  </office:meta>
</office:document-meta>
</file>